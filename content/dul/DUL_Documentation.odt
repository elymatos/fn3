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2701in" style:rel-width="100%" table:align="center"/>
    </style:style>
    <style:style style:name="Table1.A" style:family="table-column">
      <style:table-column-properties style:column-width="1.7743in" style:rel-column-width="18547*"/>
    </style:style>
    <style:style style:name="Table1.B" style:family="table-column">
      <style:table-column-properties style:column-width="1.0646in" style:rel-column-width="11128*"/>
    </style:style>
    <style:style style:name="Table1.C" style:family="table-column">
      <style:table-column-properties style:column-width="1.5382in" style:rel-column-width="16074*"/>
    </style:style>
    <style:style style:name="Table1.D" style:family="table-column">
      <style:table-column-properties style:column-width="1.8931in" style:rel-column-width="19784*"/>
    </style:style>
    <style:style style:name="Table1.A1" style:family="table-cell">
      <style:table-cell-properties fo:padding="0in" fo:border="none"/>
    </style:style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2">
      <style:paragraph-properties fo:margin-top="0in" fo:margin-bottom="0in" style:contextual-spacing="false"/>
    </style:style>
    <style:style style:name="P3" style:family="paragraph" style:parent-style-name="Text_20_body" style:list-style-name="L3">
      <style:paragraph-properties fo:margin-top="0in" fo:margin-bottom="0in" style:contextual-spacing="false"/>
    </style:style>
    <style:style style:name="P4" style:family="paragraph" style:parent-style-name="Text_20_body" style:list-style-name="L4">
      <style:paragraph-properties fo:margin-top="0in" fo:margin-bottom="0in" style:contextual-spacing="false"/>
    </style:style>
    <style:style style:name="P5" style:family="paragraph" style:parent-style-name="Text_20_body" style:list-style-name="L5">
      <style:paragraph-properties fo:margin-top="0in" fo:margin-bottom="0in" style:contextual-spacing="false"/>
    </style:style>
    <style:style style:name="P6" style:family="paragraph" style:parent-style-name="Text_20_body" style:list-style-name="L6">
      <style:paragraph-properties fo:margin-top="0in" fo:margin-bottom="0in" style:contextual-spacing="false"/>
    </style:style>
    <style:style style:name="P7" style:family="paragraph" style:parent-style-name="Text_20_body" style:list-style-name="L7">
      <style:paragraph-properties fo:margin-top="0in" fo:margin-bottom="0in" style:contextual-spacing="false"/>
    </style:style>
    <style:style style:name="P8" style:family="paragraph" style:parent-style-name="Text_20_body" style:list-style-name="L8">
      <style:paragraph-properties fo:margin-top="0in" fo:margin-bottom="0in" style:contextual-spacing="false"/>
    </style:style>
    <style:style style:name="P9" style:family="paragraph" style:parent-style-name="Text_20_body" style:list-style-name="L9">
      <style:paragraph-properties fo:margin-top="0in" fo:margin-bottom="0in" style:contextual-spacing="false"/>
    </style:style>
    <style:style style:name="P10" style:family="paragraph" style:parent-style-name="Text_20_body" style:list-style-name="L10">
      <style:paragraph-properties fo:margin-top="0in" fo:margin-bottom="0in" style:contextual-spacing="false"/>
    </style:style>
    <style:style style:name="P11" style:family="paragraph" style:parent-style-name="Text_20_body" style:list-style-name="L11">
      <style:paragraph-properties fo:margin-top="0in" fo:margin-bottom="0in" style:contextual-spacing="false"/>
    </style:style>
    <style:style style:name="P12" style:family="paragraph" style:parent-style-name="Text_20_body" style:list-style-name="L12">
      <style:paragraph-properties fo:margin-top="0in" fo:margin-bottom="0in" style:contextual-spacing="false"/>
    </style:style>
    <style:style style:name="P13" style:family="paragraph" style:parent-style-name="Text_20_body" style:list-style-name="L13">
      <style:paragraph-properties fo:margin-top="0in" fo:margin-bottom="0in" style:contextual-spacing="false"/>
    </style:style>
    <style:style style:name="P14" style:family="paragraph" style:parent-style-name="Text_20_body" style:list-style-name="L14">
      <style:paragraph-properties fo:margin-top="0in" fo:margin-bottom="0in" style:contextual-spacing="false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ext_20_body" style:list-style-name="L15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17" style:family="paragraph" style:parent-style-name="Text_20_body">
      <style:text-properties fo:font-style="italic" style:font-style-asian="italic" style:font-style-complex="italic"/>
    </style:style>
    <style:style style:name="P18" style:family="paragraph" style:parent-style-name="First_20_paragraph">
      <style:text-properties fo:font-weight="bold" style:font-weight-asian="bold" style:font-weight-complex="bold"/>
    </style:style>
    <style:style style:name="P19" style:family="paragraph" style:parent-style-name="Text_20_body" style:list-style-name="L16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20" style:family="paragraph" style:parent-style-name="Text_20_body" style:list-style-name="L17">
      <style:paragraph-properties fo:margin-top="0in" fo:margin-bottom="0in" style:contextual-spacing="false"/>
    </style:style>
    <style:style style:name="P21" style:family="paragraph" style:parent-style-name="Text_20_body" style:list-style-name="L18">
      <style:paragraph-properties fo:margin-top="0in" fo:margin-bottom="0in" style:contextual-spacing="false"/>
    </style:style>
    <style:style style:name="P22" style:family="paragraph" style:parent-style-name="Text_20_body" style:list-style-name="L19">
      <style:paragraph-properties fo:margin-top="0in" fo:margin-bottom="0in" style:contextual-spacing="false"/>
    </style:style>
    <style:style style:name="P23" style:family="paragraph" style:parent-style-name="Text_20_body" style:list-style-name="L20">
      <style:paragraph-properties fo:margin-top="0in" fo:margin-bottom="0in" style:contextual-spacing="false"/>
    </style:style>
    <style:style style:name="P24" style:family="paragraph" style:parent-style-name="Text_20_body" style:list-style-name="L21">
      <style:paragraph-properties fo:margin-top="0in" fo:margin-bottom="0in" style:contextual-spacing="false"/>
    </style:style>
    <style:style style:name="P25" style:family="paragraph" style:parent-style-name="Text_20_body" style:list-style-name="L22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26" style:family="paragraph" style:parent-style-name="Text_20_body" style:list-style-name="L23">
      <style:paragraph-properties fo:margin-top="0in" fo:margin-bottom="0in" style:contextual-spacing="false"/>
    </style:style>
    <style:style style:name="P27" style:family="paragraph" style:parent-style-name="Text_20_body" style:list-style-name="L24">
      <style:paragraph-properties fo:margin-top="0in" fo:margin-bottom="0in" style:contextual-spacing="false"/>
    </style:style>
    <style:style style:name="P28" style:family="paragraph" style:parent-style-name="Text_20_body" style:list-style-name="L25">
      <style:paragraph-properties fo:margin-top="0in" fo:margin-bottom="0in" style:contextual-spacing="false"/>
    </style:style>
    <style:style style:name="P29" style:family="paragraph" style:parent-style-name="Text_20_body" style:list-style-name="L26">
      <style:paragraph-properties fo:margin-top="0in" fo:margin-bottom="0in" style:contextual-spacing="false"/>
    </style:style>
    <style:style style:name="P30" style:family="paragraph" style:parent-style-name="Text_20_body" style:list-style-name="L27">
      <style:paragraph-properties fo:margin-top="0in" fo:margin-bottom="0in" style:contextual-spacing="false"/>
    </style:style>
    <style:style style:name="P31" style:family="paragraph" style:parent-style-name="Text_20_body" style:list-style-name="L28">
      <style:paragraph-properties fo:margin-top="0in" fo:margin-bottom="0in" style:contextual-spacing="false"/>
    </style:style>
    <style:style style:name="P32" style:family="paragraph" style:parent-style-name="Text_20_body" style:list-style-name="L29">
      <style:paragraph-properties fo:margin-top="0in" fo:margin-bottom="0in" style:contextual-spacing="false"/>
    </style:style>
    <style:style style:name="P33" style:family="paragraph" style:parent-style-name="Text_20_body" style:list-style-name="L22">
      <style:paragraph-properties fo:margin-top="0in" fo:margin-bottom="0in" style:contextual-spacing="false"/>
    </style:style>
    <style:style style:name="P34" style:family="paragraph" style:parent-style-name="Text_20_body" style:list-style-name="L30">
      <style:paragraph-properties fo:margin-top="0in" fo:margin-bottom="0in" style:contextual-spacing="false"/>
    </style:style>
    <style:style style:name="P35" style:family="paragraph" style:parent-style-name="Text_20_body" style:list-style-name="L31">
      <style:paragraph-properties fo:margin-top="0in" fo:margin-bottom="0in" style:contextual-spacing="false"/>
    </style:style>
    <style:style style:name="P36" style:family="paragraph" style:parent-style-name="Text_20_body" style:list-style-name="L32">
      <style:paragraph-properties fo:margin-top="0in" fo:margin-bottom="0in" style:contextual-spacing="false"/>
    </style:style>
    <style:style style:name="P37" style:family="paragraph" style:parent-style-name="Text_20_body" style:list-style-name="L33">
      <style:paragraph-properties fo:margin-top="0in" fo:margin-bottom="0in" style:contextual-spacing="false"/>
    </style:style>
    <style:style style:name="P38" style:family="paragraph" style:parent-style-name="Text_20_body" style:list-style-name="L34">
      <style:paragraph-properties fo:margin-top="0in" fo:margin-bottom="0in" style:contextual-spacing="false"/>
    </style:style>
    <style:style style:name="P39" style:family="paragraph" style:parent-style-name="Text_20_body" style:list-style-name="L35">
      <style:paragraph-properties fo:margin-top="0in" fo:margin-bottom="0in" style:contextual-spacing="false"/>
    </style:style>
    <style:style style:name="P40" style:family="paragraph" style:parent-style-name="Text_20_body" style:list-style-name="L36">
      <style:paragraph-properties fo:margin-top="0in" fo:margin-bottom="0in" style:contextual-spacing="false"/>
    </style:style>
    <style:style style:name="P41" style:family="paragraph" style:parent-style-name="Text_20_body" style:list-style-name="L37">
      <style:paragraph-properties fo:margin-top="0in" fo:margin-bottom="0in" style:contextual-spacing="false"/>
    </style:style>
    <style:style style:name="P42" style:family="paragraph" style:parent-style-name="Text_20_body" style:list-style-name="L38">
      <style:paragraph-properties fo:margin-top="0in" fo:margin-bottom="0in" style:contextual-spacing="false"/>
    </style:style>
    <style:style style:name="P43" style:family="paragraph" style:parent-style-name="Text_20_body" style:list-style-name="L39">
      <style:paragraph-properties fo:margin-top="0in" fo:margin-bottom="0in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comprehensive-documentation-of-dul-dolcedns-ultralite-v3.34"/>Comprehensive Documentation of DUL (DOLCE+DnS Ultralite) v3.34<text:bookmark-end text:name="comprehensive-documentation-of-dul-dolcedns-ultralite-v3.34"/></text:h>
      <text:h text:style-name="Heading_20_2" text:outline-level="2"><text:bookmark-start text:name="table-of-contents"/>Table of Contents<text:bookmark-end text:name="table-of-contents"/></text:h>
      <text:list text:style-name="L1">
        <text:list-item>
          <text:p text:style-name="P1"><text:a xlink:type="simple" xlink:href="#i-introduction--philosophy" text:style-name="Internet_20_link" text:visited-style-name="Visited_20_Internet_20_Link"><text:span text:style-name="Definition">Introduction &amp; Philosophy</text:span></text:a></text:p>
        </text:list-item>
        <text:list-item>
          <text:p text:style-name="P1"><text:a xlink:type="simple" xlink:href="#ii-the-cognitive-epistemological-mindset" text:style-name="Internet_20_link" text:visited-style-name="Visited_20_Internet_20_Link"><text:span text:style-name="Definition">The Cognitive-Epistemological Mindset</text:span></text:a></text:p>
        </text:list-item>
        <text:list-item>
          <text:p text:style-name="P1"><text:a xlink:type="simple" xlink:href="#iii-the-world-model-fundamental-categories" text:style-name="Internet_20_link" text:visited-style-name="Visited_20_Internet_20_Link"><text:span text:style-name="Definition">The World Model: Fundamental Categories</text:span></text:a></text:p>
        </text:list-item>
        <text:list-item>
          <text:p text:style-name="P1"><text:a xlink:type="simple" xlink:href="#iv-context-modeling-framework" text:style-name="Internet_20_link" text:visited-style-name="Visited_20_Internet_20_Link"><text:span text:style-name="Definition">Context Modeling Framework</text:span></text:a></text:p>
        </text:list-item>
        <text:list-item>
          <text:p text:style-name="P1"><text:a xlink:type="simple" xlink:href="#v-key-design-patterns" text:style-name="Internet_20_link" text:visited-style-name="Visited_20_Internet_20_Link"><text:span text:style-name="Definition">Key Design Patterns</text:span></text:a></text:p>
        </text:list-item>
        <text:list-item>
          <text:p text:style-name="P1"><text:a xlink:type="simple" xlink:href="#vi-class-hierarchy-reference" text:style-name="Internet_20_link" text:visited-style-name="Visited_20_Internet_20_Link"><text:span text:style-name="Definition">Class Hierarchy Reference</text:span></text:a></text:p>
        </text:list-item>
        <text:list-item>
          <text:p text:style-name="P1"><text:a xlink:type="simple" xlink:href="#vii-property-reference" text:style-name="Internet_20_link" text:visited-style-name="Visited_20_Internet_20_Link"><text:span text:style-name="Definition">Property Reference</text:span></text:a></text:p>
        </text:list-item>
        <text:list-item>
          <text:p text:style-name="P1"><text:a xlink:type="simple" xlink:href="#viii-usage-guidelines" text:style-name="Internet_20_link" text:visited-style-name="Visited_20_Internet_20_Link"><text:span text:style-name="Definition">Usage Guidelines</text:span></text:a></text:p>
        </text:list-item>
      </text:list>
      <text:p text:style-name="Horizontal_20_Line"/>
      <text:h text:style-name="Heading_20_2" text:outline-level="2"><text:bookmark-start text:name="i.-introduction-philosophy"/>I. Introduction &amp; Philosophy<text:bookmark-end text:name="i.-introduction-philosophy"/></text:h>
      <text:h text:style-name="Heading_20_3" text:outline-level="3"><text:bookmark-start text:name="what-is-dul"/>1.1 What is DUL?<text:bookmark-end text:name="what-is-dul"/></text:h>
      <text:p text:style-name="First_20_paragraph">DUL (DOLCE+DnS Ultralite) is a <text:span text:style-name="T1">foundational ontology</text:span> designed to provide reusable, domain-independent patterns for modeling any domain of discourse. It represents a <text:span text:style-name="T1">simplification and practical adaptation</text:span> of DOLCE (Descriptive Ontology for Linguistic and Cognitive Engineering), one of the most influential foundational ontologies in knowledge representation.</text:p>
      <text:p text:style-name="Text_20_body"><text:span text:style-name="T1">Key characteristics:</text:span> - <text:span text:style-name="T1">Pattern-based architecture</text:span>: DUL is not just a taxonomy, but a collection of content ontology design patterns (ODPs) - <text:span text:style-name="T1">Lightweight yet foundational</text:span>: Easier to apply than full DOLCE while maintaining philosophical rigor - <text:span text:style-name="T1">Domain-agnostic</text:span>: Designed to work across physical, social, and mental domains - <text:span text:style-name="T1">Epistemologically committed</text:span>: Recognizes that our knowledge is framed by descriptions and contexts</text:p>
      <text:h text:style-name="Heading_20_3" text:outline-level="3"><text:bookmark-start text:name="origins-and-evolution"/>1.2 Origins and Evolution<text:bookmark-end text:name="origins-and-evolution"/></text:h>
      <text:p text:style-name="First_20_paragraph">DUL emerged from the <text:span text:style-name="T1">Ontology Design Patterns</text:span> (ODP) initiative, which recognized that ontology engineering benefits from reusable conceptual patterns, similar to design patterns in software engineering.</text:p>
      <text:p text:style-name="Text_20_body"><text:span text:style-name="T1">From DOLCE to DUL:</text:span> - <text:span text:style-name="T1">DOLCE Lite-Plus</text:span>: The parent ontology, grounded in formal ontology and philosophical analysis - <text:span text:style-name="T1">Simplification goals</text:span>: Make names more intuitive, relax some formal constraints, focus on practical applicability - <text:span text:style-name="T1">Integration of D&amp;S</text:span>: Incorporates the Descriptions and Situations (D&amp;S) pattern as a core architectural principle</text:p>
      <text:p text:style-name="Text_20_body"><text:span text:style-name="T1">Version 3.34 highlights:</text:span> - Enhanced mereological (part-whole) support with multiple parthood relations - N-ary relation reification through Situations - Improved handling of time-indexed relations - Refinement of Person-related classes - Top-level repositioning of Situation class for broader applicability</text:p>
      <text:h text:style-name="Heading_20_3" text:outline-level="3"><text:bookmark-start text:name="core-ontological-commitments"/><text:soft-page-break/>1.3 Core Ontological Commitments<text:bookmark-end text:name="core-ontological-commitments"/></text:h>
      <text:p text:style-name="First_20_paragraph">DUL makes several fundamental commitments about reality and how we model it:</text:p>
      <text:h text:style-name="Heading_20_4" text:outline-level="4"><text:bookmark-start text:name="descriptive-vs.-prescriptive"/>1.3.1 Descriptive vs. Prescriptive<text:bookmark-end text:name="descriptive-vs.-prescriptive"/></text:h>
      <text:p text:style-name="First_20_paragraph">DUL is <text:span text:style-name="T1">descriptive</text:span>: it aims to model how people actually conceptualize reality, not to prescribe a single “correct” ontology. This philosophical stance acknowledges <text:span text:style-name="T1">ontological pluralism</text:span>—different communities and contexts may legitimately organize reality differently.</text:p>
      <text:h text:style-name="Heading_20_4" text:outline-level="4"><text:bookmark-start text:name="the-frame-based-view"/>1.3.2 The Frame-Based View<text:bookmark-end text:name="the-frame-based-view"/></text:h>
      <text:p text:style-name="First_20_paragraph">Reality is always understood <text:span text:style-name="T1">through conceptual frames</text:span> (Descriptions). We never access “raw reality” but always reality-as-interpreted. This echoes: - <text:span text:style-name="T1">Kant’s epistemology</text:span>: We know phenomena (appearances) through mental categories, not noumena (things-in-themselves) - <text:span text:style-name="T1">Frame semantics</text:span> (Fillmore): Concepts are understood within structured mental frames - <text:span text:style-name="T1">Constructivism</text:span>: Social reality is constructed through shared conceptualizations</text:p>
      <text:h text:style-name="Heading_20_4" text:outline-level="4"><text:bookmark-start text:name="multiple-perspectives"/>1.3.3 Multiple Perspectives<text:bookmark-end text:name="multiple-perspectives"/></text:h>
      <text:p text:style-name="First_20_paragraph">The same entity can be validly viewed from multiple perspectives: - An event can be seen as an <text:span text:style-name="T1">accomplishment</text:span>, <text:span text:style-name="T1">achievement</text:span>, <text:span text:style-name="T1">process</text:span>, or <text:span text:style-name="T1">state transition</text:span> - A physical object can be a <text:span text:style-name="T1">designed artifact</text:span>, a <text:span text:style-name="T1">biological object</text:span>, or a <text:span text:style-name="T1">refunctionalized entity</text:span> - These are not different identities but different <text:span text:style-name="T1">Situations</text:span> that frame the same entity according to different <text:span text:style-name="T1">Descriptions</text:span></text:p>
      <text:h text:style-name="Heading_20_4" text:outline-level="4"><text:bookmark-start text:name="reification-strategy"/>1.3.4 Reification Strategy<text:bookmark-end text:name="reification-strategy"/></text:h>
      <text:p text:style-name="First_20_paragraph">DUL heavily uses <text:span text:style-name="T1">reification</text:span>—turning relations and attributes into first-class entities: - <text:span text:style-name="T1">Qualities</text:span>: Instead of direct attributes, DUL reifies qualities (e.g., “the yellowness of Dmitri’s skin”) - <text:span text:style-name="T1">Regions</text:span>: Values are abstract regions in dimensional spaces (e.g., specific colors in color space) - <text:span text:style-name="T1">Situations</text:span>: Relations are reified as situations (e.g., “John being a student in 2024” is a situation)</text:p>
      <text:p text:style-name="Text_20_body">This enables: - <text:span text:style-name="T1">Time-indexing</text:span>: “John was a student in 2020 but is now a teacher” - <text:span text:style-name="T1">Context-sensitivity</text:span>: “This object is a cradle in the baby room but a flower pot in the garden” - <text:span text:style-name="T1">N-ary relations</text:span>: Relations with more than two participants</text:p>
      <text:h text:style-name="Heading_20_3" text:outline-level="3"><text:bookmark-start text:name="design-principles"/>1.4 Design Principles<text:bookmark-end text:name="design-principles"/></text:h>
      <text:h text:style-name="Heading_20_4" text:outline-level="4"><text:bookmark-start text:name="pattern-reusability"/>1.4.1 Pattern Reusability<text:bookmark-end text:name="pattern-reusability"/></text:h>
      <text:p text:style-name="First_20_paragraph">DUL classes and properties are designed to be <text:span text:style-name="T1">reused across domains</text:span>. Rather than creating domain-specific concepts from scratch, ontology designers: 1. Identify relevant DUL patterns 2. Specialize DUL classes for their domain 3. Combine patterns to create rich domain models</text:p>
      <text:h text:style-name="Heading_20_4" text:outline-level="4"><text:bookmark-start text:name="simplicity-over-formal-completeness"/><text:soft-page-break/>1.4.2 Simplicity over Formal Completeness<text:bookmark-end text:name="simplicity-over-formal-completeness"/></text:h>
      <text:p text:style-name="First_20_paragraph">Unlike DOLCE, DUL favors: - <text:span text:style-name="T1">Intuitive naming</text:span>: “Object” instead of “Endurant”, “Event” instead of “Perdurant” - <text:span text:style-name="T1">Relaxed constraints</text:span>: Fewer formal restrictions for easier adoption - <text:span text:style-name="T1">OWL2 expressivity</text:span>: Uses OWL2 features but avoids overly complex axioms</text:p>
      <text:h text:style-name="Heading_20_4" text:outline-level="4"><text:bookmark-start text:name="social-and-cognitive-orientation"/>1.4.3 Social and Cognitive Orientation<text:bookmark-end text:name="social-and-cognitive-orientation"/></text:h>
      <text:p text:style-name="First_20_paragraph">DUL gives special prominence to: - <text:span text:style-name="T1">Social objects</text:span>: Entities that exist through communication and shared understanding - <text:span text:style-name="T1">Information</text:span>: Abstract information vs. concrete realizations - <text:span text:style-name="T1">Descriptions</text:span>: Conceptual schemas that organize experience - <text:span text:style-name="T1">Agency</text:span>: Agents, roles, tasks, plans, and intentional action</text:p>
      <text:p text:style-name="Horizontal_20_Line"/>
      <text:h text:style-name="Heading_20_2" text:outline-level="2"><text:bookmark-start text:name="ii.-the-cognitive-epistemological-mindset"/>II. The Cognitive-Epistemological Mindset<text:bookmark-end text:name="ii.-the-cognitive-epistemological-mindset"/></text:h>
      <text:h text:style-name="Heading_20_3" text:outline-level="3"><text:bookmark-start text:name="the-central-insight-descriptions-and-situations"/>2.1 The Central Insight: Descriptions and Situations<text:bookmark-end text:name="the-central-insight-descriptions-and-situations"/></text:h>
      <text:p text:style-name="First_20_paragraph">The most distinctive feature of DUL is the <text:span text:style-name="T1">D&amp;S (Descriptions and Situations) pattern</text:span>, which embodies a fundamentally <text:span text:style-name="T1">epistemological</text:span> approach to ontology.</text:p>
      <text:h text:style-name="Heading_20_4" text:outline-level="4"><text:bookmark-start text:name="core-distinction"/>Core Distinction:<text:bookmark-end text:name="core-distinction"/></text:h>
      <text:list text:style-name="L2">
        <text:list-item>
          <text:p text:style-name="P2"><text:span text:style-name="T1">Description</text:span>: A conceptual schema, theory, or frame that defines concepts and their relationships</text:p>
        </text:list-item>
        <text:list-item>
          <text:p text:style-name="P2"><text:span text:style-name="T1">Situation</text:span>: A view on reality that satisfies (is consistent with) a description</text:p>
        </text:list-item>
      </text:list>
      <text:p text:style-name="First_20_paragraph"><text:span text:style-name="T1">Example:</text:span> - <text:span text:style-name="T1">Description</text:span>: “A recipe for chocolate cake” (defines ingredients, procedures, roles like ‘baker’, tasks like ‘mixing’) - <text:span text:style-name="T1">Situation</text:span>: “My baking session this morning” (satisfies the recipe: I played the baker role, I executed the mixing task, etc.)</text:p>
      <text:p text:style-name="Text_20_body">This separation allows us to model: 1. <text:span text:style-name="T1">The same reality under different theories</text:span>: An avalanche can be framed as a natural process (physics) or as a crime scene (law) 2. <text:span text:style-name="T1">Theories without instances</text:span>: We can model the recipe even if no one has ever baked that cake 3. <text:span text:style-name="T1">Multiple interpretations</text:span>: The same physical event can satisfy different descriptions (diagnosis, narrative, legal norm)</text:p>
      <text:h text:style-name="Heading_20_3" text:outline-level="3"><text:bookmark-start text:name="the-epistemological-commitment"/>2.2 The Epistemological Commitment<text:bookmark-end text:name="the-epistemological-commitment"/></text:h>
      <text:p text:style-name="First_20_paragraph">DUL recognizes that <text:span text:style-name="T1">knowledge is always mediated by conceptual frameworks</text:span>. This has profound implications:</text:p>
      <text:h text:style-name="Heading_20_4" text:outline-level="4"><text:bookmark-start text:name="no-direct-access-to-reality"/>2.2.1 No Direct Access to Reality<text:bookmark-end text:name="no-direct-access-to-reality"/></text:h>
      <text:p text:style-name="First_20_paragraph">We never model “raw objects” or “raw events”—we model: - Objects-as-classified (a physical entity as a “car”, as a “weapon”, as “evidence”) - Events-as-interpreted (a physical process as an “action”, as an “accident”, as a “crime”)</text:p>
      <text:p text:style-name="Text_20_body">DUL makes this explicit through: - <text:span text:style-name="T1">classifies/isClassifiedBy</text:span>: Concepts classify entities <text:soft-page-break/>within contexts - <text:span text:style-name="T1">satisfies/isSatisfiedBy</text:span>: Situations satisfy descriptions that provide interpretation</text:p>
      <text:h text:style-name="Heading_20_4" text:outline-level="4"><text:bookmark-start text:name="context-dependence"/>2.2.2 Context Dependence<text:bookmark-end text:name="context-dependence"/></text:h>
      <text:p text:style-name="First_20_paragraph">The “same” entity can have different identities in different contexts: - An old cradle is a <text:span text:style-name="T1">baby furniture</text:span> in a museum (satisfying a historical design description) - The same cradle is a <text:span text:style-name="T1">flower pot</text:span> in a garden (satisfying a home decoration description)</text:p>
      <text:p text:style-name="Text_20_body">Both are valid, non-contradictory views—they are different Situations that include the same physical object.</text:p>
      <text:h text:style-name="Heading_20_4" text:outline-level="4"><text:bookmark-start text:name="observer-relativity"/>2.2.3 Observer Relativity<text:bookmark-end text:name="observer-relativity"/></text:h>
      <text:p text:style-name="First_20_paragraph">DUL acknowledges that <text:span text:style-name="T1">observers create contexts</text:span>: - A Situation is “a view created by an observer on the basis of a frame” - Different observers (or the same observer at different times) can create different situations from the same data</text:p>
      <text:h text:style-name="Heading_20_3" text:outline-level="3"><text:bookmark-start text:name="the-social-construction-of-reality"/>2.3 The Social Construction of Reality<text:bookmark-end text:name="the-social-construction-of-reality"/></text:h>
      <text:p text:style-name="First_20_paragraph">DUL distinguishes <text:span text:style-name="T1">PhysicalObject</text:span> and <text:span text:style-name="T1">SocialObject</text:span> as disjoint:</text:p>
      <text:h text:style-name="Heading_20_4" text:outline-level="4"><text:bookmark-start text:name="physicalobject"/>PhysicalObject<text:bookmark-end text:name="physicalobject"/></text:h>
      <text:list text:style-name="L3">
        <text:list-item>
          <text:p text:style-name="P3">Has spatial location and (typically) mass</text:p>
        </text:list-item>
        <text:list-item>
          <text:p text:style-name="P3">Exists independently of human conceptualization</text:p>
        </text:list-item>
        <text:list-item>
          <text:p text:style-name="P3">Examples: rocks, trees, human bodies, buildings</text:p>
        </text:list-item>
      </text:list>
      <text:h text:style-name="Heading_20_4" text:outline-level="4"><text:bookmark-start text:name="socialobject"/>SocialObject<text:bookmark-end text:name="socialobject"/></text:h>
      <text:list text:style-name="L4">
        <text:list-item>
          <text:p text:style-name="P4">Exists <text:span text:style-name="T1">only through communication</text:span> and shared understanding</text:p>
        </text:list-item>
        <text:list-item>
          <text:p text:style-name="P4">Must be <text:span text:style-name="T1">expressed by InformationObject</text:span>s (speech, writing, gestures)</text:p>
        </text:list-item>
        <text:list-item>
          <text:p text:style-name="P4">Examples: laws, roles, organizations, concepts, money, marriages</text:p>
        </text:list-item>
      </text:list>
      <text:p text:style-name="First_20_paragraph"><text:span text:style-name="T1">Key insight</text:span>: Social reality is <text:span text:style-name="T1">ontologically dependent</text:span> on information: - A marriage exists because it is expressed in legal documents and social practices - A role (e.g., “professor”) exists because it is defined in institutional descriptions - An organization exists because its structure is documented and communicated</text:p>
      <text:p text:style-name="Text_20_body">This captures the <text:span text:style-name="T1">constitutive role of language and communication</text:span> in creating social facts (echoing John Searle’s philosophy of social ontology).</text:p>
      <text:h text:style-name="Heading_20_3" text:outline-level="3"><text:bookmark-start text:name="information-and-meaning"/>2.4 Information and Meaning<text:bookmark-end text:name="information-and-meaning"/></text:h>
      <text:p text:style-name="First_20_paragraph">DUL provides a sophisticated model of <text:span text:style-name="T1">information</text:span> that distinguishes:</text:p>
      <text:h text:style-name="Heading_20_4" text:outline-level="4"><text:bookmark-start text:name="informationobject-abstract"/>InformationObject (Abstract)<text:bookmark-end text:name="informationobject-abstract"/></text:h>
      <text:p text:style-name="First_20_paragraph">The information content itself, independent of physical realization: - The 3rd Gymnopedie by Satie (the musical composition) - The text of the Italian Constitution (the legal content) - The concept “dog” (the mental/social construct)</text:p>
      <text:h text:style-name="Heading_20_4" text:outline-level="4"><text:bookmark-start text:name="informationrealization-concrete"/><text:soft-page-break/>InformationRealization (Concrete)<text:bookmark-end text:name="informationrealization-concrete"/></text:h>
      <text:p text:style-name="First_20_paragraph">Physical or event-based realizations: - A printed music sheet, a piano performance, a recording - A specific book copy, an oral recitation - Utterances of the word “dog”, written tokens</text:p>
      <text:p text:style-name="Text_20_body"><text:span text:style-name="T1">Relation</text:span>: <text:span text:style-name="Source_5f_Text">realizes</text:span> connects InformationRealization to InformationObject</text:p>
      <text:h text:style-name="Heading_20_4" text:outline-level="4"><text:bookmark-start text:name="expresses-relation"/>expresses Relation<text:bookmark-end text:name="expresses-relation"/></text:h>
      <text:p text:style-name="First_20_paragraph">InformationObjects <text:span text:style-name="T1">express</text:span> SocialObjects (their “meanings”): - The term “professor” expresses the Role concept ‘Professor’ - The recipe text expresses the Plan for making cake - The Constitution text expresses the legal Norm system</text:p>
      <text:p text:style-name="Text_20_body">This three-level model (Physical Realization → Abstract Information → Social Meaning) provides a foundation for: - Semantic web and knowledge representation - Cultural heritage documentation - Legal and institutional modeling - Discourse and narrative analysis</text:p>
      <text:h text:style-name="Heading_20_3" text:outline-level="3"><text:bookmark-start text:name="the-cognitive-premise-concepts-and-classification"/>2.5 The Cognitive Premise: Concepts and Classification<text:bookmark-end text:name="the-cognitive-premise-concepts-and-classification"/></text:h>
      <text:p text:style-name="First_20_paragraph">DUL models the <text:span text:style-name="T1">cognitive act of categorization</text:span>:</text:p>
      <text:h text:style-name="Heading_20_4" text:outline-level="4"><text:bookmark-start text:name="concept"/>Concept<text:bookmark-end text:name="concept"/></text:h>
      <text:p text:style-name="First_20_paragraph">A SocialObject that <text:span text:style-name="T1">classifies</text:span> entities: - Defined within a Description - Can be reused across descriptions - Acts as an intensional category (the “idea” of something)</text:p>
      <text:h text:style-name="Heading_20_4" text:outline-level="4"><text:bookmark-start text:name="classification-time-indexed"/>Classification (Time-Indexed)<text:bookmark-end text:name="classification-time-indexed"/></text:h>
      <text:p text:style-name="First_20_paragraph">A special Situation that captures: - What concept classifies what entity - At what time interval - Within what larger context</text:p>
      <text:p text:style-name="Text_20_body"><text:span text:style-name="T1">Example</text:span>: “My old cradle <text:span text:style-name="T1">is classified as</text:span> a flower pot <text:span text:style-name="T1">in June 2024</text:span> (within the situation of my garden decoration project)”</text:p>
      <text:p text:style-name="Text_20_body">This allows: - <text:span text:style-name="T1">Dynamic classification</text:span>: Entities can be reclassified over time - <text:span text:style-name="T1">Context-dependent classification</text:span>: Different classifications in different situations - <text:span text:style-name="T1">Multiple simultaneous classifications</text:span>: The cradle is still a cradle (historically) even while functioning as a flower pot</text:p>
      <text:h text:style-name="Heading_20_3" text:outline-level="3"><text:bookmark-start text:name="the-quality-region-pattern"/>2.6 The Quality-Region Pattern<text:bookmark-end text:name="the-quality-region-pattern"/></text:h>
      <text:p text:style-name="First_20_paragraph">DUL reifies attributes through the <text:span text:style-name="T1">Quality-Region</text:span> pattern:</text:p>
      <text:h text:style-name="Heading_20_4" text:outline-level="4"><text:bookmark-start text:name="quality"/>Quality<text:bookmark-end text:name="quality"/></text:h>
      <text:p text:style-name="First_20_paragraph">An individual <text:span text:style-name="T1">aspect</text:span> of an entity: - Cannot exist without the entity (dependent) - The specific yellowness of Dmitri’s skin - The specific height of the Eiffel Tower</text:p>
      <text:h text:style-name="Heading_20_4" text:outline-level="4"><text:bookmark-start text:name="region"/><text:soft-page-break/>Region<text:bookmark-end text:name="region"/></text:h>
      <text:p text:style-name="First_20_paragraph">An abstract value in a dimensional space: - Independent of particular entities - “180 cm” in the space of possible heights - “Yellow” in color space</text:p>
      <text:p text:style-name="Text_20_body"><text:span text:style-name="T1">Relation</text:span>: <text:span text:style-name="Source_5f_Text">hasRegion</text:span> connects Quality to Region (the quality’s value)</text:p>
      <text:p text:style-name="Text_20_body"><text:span text:style-name="T1">Why this complexity?</text:span> 1. <text:span text:style-name="T1">Observation vs. reality</text:span>: The same quality (Dmitri’s skin color) can be measured differently (RGB values, wavelengths, color names) 2. <text:span text:style-name="T1">Temporal change</text:span>: Qualities persist even as their regions change (Dmitri’s skin can tan) 3. <text:span text:style-name="T1">Parameter-based constraints</text:span>: Concepts can constrain regions (Role ‘Driver’ requires Parameter ‘MinimumAge’ &gt; 16)</text:p>
      <text:h text:style-name="Heading_20_3" text:outline-level="3"><text:bookmark-start text:name="epistemological-vs.-ontological-modeling"/>2.7 Epistemological vs. Ontological Modeling<text:bookmark-end text:name="epistemological-vs.-ontological-modeling"/></text:h>
      <text:p text:style-name="First_20_paragraph">DUL allows modeling at two levels:</text:p>
      <text:h text:style-name="Heading_20_4" text:outline-level="4"><text:bookmark-start text:name="ontological-level"/>Ontological Level<text:bookmark-end text:name="ontological-level"/></text:h>
      <text:p text:style-name="First_20_paragraph">What exists in the domain: - Physical objects, events, their parts and qualities - Mereological (part-whole) relations - Spatial and temporal location</text:p>
      <text:h text:style-name="Heading_20_4" text:outline-level="4"><text:bookmark-start text:name="epistemological-level"/>Epistemological Level<text:bookmark-end text:name="epistemological-level"/></text:h>
      <text:p text:style-name="First_20_paragraph">How we conceptualize and organize what exists: - Descriptions, concepts, roles, tasks - Situations, classifications, contexts - Information objects expressing knowledge</text:p>
      <text:p text:style-name="Text_20_body">Most ontologies focus only on the ontological level. DUL’s innovation is <text:span text:style-name="T1">integrating both</text:span>, acknowledging that: - Domain models are not “reality” but “conceptualizations of reality” - Different conceptualizations can coexist (pluralism) - The act of modeling itself involves descriptions and situations</text:p>
      <text:p text:style-name="Horizontal_20_Line"/>
      <text:h text:style-name="Heading_20_2" text:outline-level="2"><text:bookmark-start text:name="iii.-the-world-model-fundamental-categories"/>III. The World Model: Fundamental Categories<text:bookmark-end text:name="iii.-the-world-model-fundamental-categories"/></text:h>
      <text:h text:style-name="Heading_20_3" text:outline-level="3"><text:bookmark-start text:name="the-top-level-ontology"/>3.1 The Top-Level Ontology<text:bookmark-end text:name="the-top-level-ontology"/></text:h>
      <text:p text:style-name="First_20_paragraph">DUL’s root is <text:span text:style-name="T1">Entity</text:span>, defined as: “<text:span text:style-name="T2">Anything: real, possible, or imaginary, which some modeller wants to talk about for some purpose.</text:span>”</text:p>
      <text:p text:style-name="Text_20_body">This maximally permissive definition reflects DUL’s <text:span text:style-name="T1">pluralistic</text:span> stance: if someone needs to model something, it qualifies as an Entity.</text:p>
      <text:h text:style-name="Heading_20_4" text:outline-level="4"><text:bookmark-start text:name="direct-subclasses-of-entity"/>Direct subclasses of Entity:<text:bookmark-end text:name="direct-subclasses-of-entity"/></text:h>
      <text:p text:style-name="Preformatted_20_Text">Entity</text:p>
      <text:p text:style-name="Preformatted_20_Text">├── Abstract <text:s text:c="9"/>(not located in space-time)</text:p>
      <text:p text:style-name="Preformatted_20_Text">├── Event <text:s text:c="12"/>(temporal extent, participants)</text:p>
      <text:p text:style-name="Preformatted_20_Text">├── InformationEntity (information: abstract or concrete)</text:p>
      <text:p text:style-name="Preformatted_20_Text">├── Object <text:s text:c="11"/>(spatial location)</text:p>
      <text:p text:style-name="Preformatted_20_Text"><text:soft-page-break/>├── Quality <text:s text:c="10"/>(aspects of entities)</text:p>
      <text:p text:style-name="Preformatted_20_Text">└── Situation <text:s text:c="8"/>(contextualized views)</text:p>
      <text:h text:style-name="Heading_20_3" text:outline-level="3"><text:bookmark-start text:name="abstract-entities"/>3.2 Abstract Entities<text:bookmark-end text:name="abstract-entities"/></text:h>
      <text:p text:style-name="First_20_paragraph"><text:span text:style-name="T1">Abstract</text:span>: Entities not located in space-time.</text:p>
      <text:h text:style-name="Heading_20_4" text:outline-level="4"><text:bookmark-start text:name="key-subclasses"/>Key subclasses:<text:bookmark-end text:name="key-subclasses"/></text:h>
      <text:p text:style-name="First_20_paragraph"><text:span text:style-name="T1">FormalEntity</text:span> - Formally defined, context-independent, “Platonic” entities - Mathematical entities: sets, categories, functions - Distinguished from Concepts (which are social/context-dependent) - Example: The mathematical set ℕ (natural numbers)</text:p>
      <text:p text:style-name="Text_20_body"><text:span text:style-name="T1">Region</text:span> - Values in dimensional spaces - Subclasses represent different dimensions: - <text:span text:style-name="T1">SpaceRegion</text:span>: Spatial coordinates, geometries - <text:span text:style-name="T1">TimeInterval</text:span>: Temporal extents - <text:span text:style-name="T1">Amount</text:span>: Quantities (mass, volume, count) - <text:span text:style-name="T1">PhysicalAttribute</text:span>: Physical measurements (temperature, pressure) - <text:span text:style-name="T1">SocialObjectAttribute</text:span>: Social attributes (salary level, legal status)</text:p>
      <text:p text:style-name="Text_20_body"><text:span text:style-name="T1">Why Regions are Abstract:</text:span> - The number “42” exists independently of any particular 42 objects - The color “red” exists independently of any particular red object - They inhabit abstract dimensional spaces, not physical space-time</text:p>
      <text:h text:style-name="Heading_20_3" text:outline-level="3"><text:bookmark-start text:name="objects"/>3.3 Objects<text:bookmark-end text:name="objects"/></text:h>
      <text:p text:style-name="First_20_paragraph"><text:span text:style-name="T1">Object</text:span>: Entities with spatial location, participating in events.</text:p>
      <text:h text:style-name="Heading_20_4" text:outline-level="4"><text:bookmark-start text:name="the-physical-vs.-social-divide"/>The Physical vs. Social Divide<text:bookmark-end text:name="the-physical-vs.-social-divide"/></text:h>
      <text:p text:style-name="First_20_paragraph">DUL makes <text:span text:style-name="T1">PhysicalObject</text:span> and <text:span text:style-name="T1">SocialObject</text:span> disjoint—a fundamental ontological distinction:</text:p>
      <text:h text:style-name="Heading_20_3" text:outline-level="3"><text:bookmark-start text:name="physicalobject-1"/>PhysicalObject<text:bookmark-end text:name="physicalobject-1"/></text:h>
      <text:list text:style-name="L5">
        <text:list-item>
          <text:p text:style-name="P5">Has spatial region</text:p>
        </text:list-item>
        <text:list-item>
          <text:p text:style-name="P5">Has (typically) mass</text:p>
        </text:list-item>
        <text:list-item>
          <text:p text:style-name="P5">Exists independently of communication</text:p>
        </text:list-item>
      </text:list>
      <text:p text:style-name="First_20_paragraph"><text:span text:style-name="T1">Subclasses:</text:span> - <text:span text:style-name="T1">PhysicalBody</text:span>: Natural material objects - <text:span text:style-name="T1">BiologicalObject</text:span>: Living organisms - <text:span text:style-name="T1">ChemicalObject</text:span>: Chemical substances - <text:span text:style-name="T1">Substance</text:span>: Materials (water, steel, DNA) - <text:span text:style-name="T1">PhysicalArtifact</text:span>: Human-made physical objects - <text:span text:style-name="T1">DesignedArtifact</text:span>: Artifacts with explicit design (cars, buildings) - <text:span text:style-name="T1">PhysicalPlace</text:span>: Locations understood as physical regions</text:p>
      <text:h text:style-name="Heading_20_3" text:outline-level="3"><text:bookmark-start text:name="socialobject-1"/>SocialObject<text:bookmark-end text:name="socialobject-1"/></text:h>
      <text:list text:style-name="L6">
        <text:list-item>
          <text:p text:style-name="P6">Exists through communication (in “some communication Event”)</text:p>
        </text:list-item>
        <text:list-item>
          <text:p text:style-name="P6">Must be <text:span text:style-name="T1">expressed by InformationObject</text:span></text:p>
        </text:list-item>
        <text:list-item>
          <text:p text:style-name="P6">Disjoint from PhysicalObject</text:p>
        </text:list-item>
      </text:list>
      <text:p text:style-name="First_20_paragraph"><text:span text:style-name="T1">Subclasses:</text:span> - <text:span text:style-name="T1">Description</text:span>: Conceptual schemas (theories, frames) - Plan, Design, Diagnosis, Norm, Contract, Goal, Theory, Narrative - <text:span text:style-name="T1">Concept</text:span>: Categories defined in descriptions - Role, Task, EventType, Parameter - <text:span text:style-name="T1">Collection</text:span>: Containers for entities sharing properties - <text:soft-page-break/>Configuration, Collective, TypeCollection - <text:span text:style-name="T1">InformationObject</text:span>: Abstract information pieces - <text:span text:style-name="T1">Place</text:span>: Socially constructed locations (countries, neighborhoods)</text:p>
      <text:h text:style-name="Heading_20_3" text:outline-level="3"><text:bookmark-start text:name="agent-cross-cutting"/>Agent (Cross-cutting)<text:bookmark-end text:name="agent-cross-cutting"/></text:h>
      <text:p text:style-name="First_20_paragraph">A special Object category for entities with agency:</text:p>
      <text:list xml:id="list1121979915" text:style-name="L7">
        <text:list-item>
          <text:p text:style-name="P7"><text:span text:style-name="T1">PhysicalAgent</text:span>: Biological agents (organisms, persons as physical beings)</text:p>
        </text:list-item>
        <text:list-item>
          <text:p text:style-name="P7"><text:span text:style-name="T1">SocialAgent</text:span>: Socially constructed agents</text:p>
          <text:list text:style-name="L8">
            <text:list-item>
              <text:p text:style-name="P8"><text:span text:style-name="T1">Organization</text:span>: Structured institutions (companies, governments)</text:p>
            </text:list-item>
            <text:list-item>
              <text:p text:style-name="P8"><text:span text:style-name="T1">CollectiveAgent</text:span>: Groups acting collectively</text:p>
              <text:list text:style-name="L9">
                <text:list-item>
                  <text:p text:style-name="P9"><text:span text:style-name="T1">Group</text:span>: Coordinated collectives (committees, teams)</text:p>
                </text:list-item>
                <text:list-item>
                  <text:p text:style-name="P9"><text:span text:style-name="T1">Community</text:span>: Large-scale collectives (societies, movements)</text:p>
                </text:list-item>
              </text:list>
            </text:list-item>
          </text:list>
        </text:list-item>
      </text:list>
      <text:p text:style-name="First_20_paragraph"><text:span text:style-name="T1">Person</text:span> is modeled with two facets: - <text:span text:style-name="T1">NaturalPerson</text:span>: The physical/biological aspect (extends Person and PhysicalAgent) - <text:span text:style-name="T1">SocialPerson</text:span>: The social/legal aspect (extends Person)</text:p>
      <text:p text:style-name="Text_20_body">This dual modeling reflects that a person is both a physical organism and a social entity with roles, rights, and legal status.</text:p>
      <text:h text:style-name="Heading_20_3" text:outline-level="3"><text:bookmark-start text:name="events"/>3.4 Events<text:bookmark-end text:name="events"/></text:h>
      <text:p text:style-name="First_20_paragraph"><text:span text:style-name="T1">Event</text:span>: “Any physical, social, or mental process, event, or state.”</text:p>
      <text:h text:style-name="Heading_20_4" text:outline-level="4"><text:bookmark-start text:name="duls-aspectual-neutrality"/>DUL’s Aspectual Neutrality<text:bookmark-end text:name="duls-aspectual-neutrality"/></text:h>
      <text:p text:style-name="First_20_paragraph">The Event class documentation provides extensive philosophical discussion:</text:p>
      <text:p text:style-name="Text_20_body"><text:span text:style-name="T1">The Problem</text:span>: The same real-world occurrence can be viewed as: - An <text:span text:style-name="T1">accomplishment</text:span> (process leading to a result) - An <text:span text:style-name="T1">achievement</text:span> (the result state) - A <text:span text:style-name="T1">punctual event</text:span> (time-collapsed) - A <text:span text:style-name="T1">transition</text:span> (change between states)</text:p>
      <text:p text:style-name="Text_20_body"><text:span text:style-name="T1">DUL’s Solution</text:span>: Don’t classify Events by aspect—use <text:span text:style-name="T1">Situations</text:span> for aspectual views: - The Event “rock erosion in Sinni valley” has a single identity - <text:span text:style-name="T1">ErosionAsAccomplishment</text:span>: A Situation viewing it as a process - <text:span text:style-name="T1">ErosionAsTransition</text:span>: A Situation viewing it as a state change - Both Situations include the same Event but satisfy different Descriptions (theories of aspect)</text:p>
      <text:h text:style-name="Heading_20_4" text:outline-level="4"><text:bookmark-start text:name="subclasses"/>Subclasses:<text:bookmark-end text:name="subclasses"/></text:h>
      <text:p text:style-name="First_20_paragraph"><text:span text:style-name="T1">Action</text:span> - Event with at least one <text:span text:style-name="T1">Agent</text:span> participant - Executes a <text:span text:style-name="T1">Task</text:span> typically defined in a Plan - Intentional, goal-directed</text:p>
      <text:p text:style-name="Text_20_body"><text:span text:style-name="T1">Process</text:span> - Event without agentive focus - Natural or social processes (erosion, inflation, aging)</text:p>
      <text:p text:style-name="Text_20_body"><text:span text:style-name="T1">State</text:span> (implied but not always distinguished) - Stative events (being tall, being red)</text:p>
      <text:h text:style-name="Heading_20_3" text:outline-level="3"><text:bookmark-start text:name="qualities"/>3.5 Qualities<text:bookmark-end text:name="qualities"/></text:h>
      <text:p text:style-name="First_20_paragraph"><text:span text:style-name="T1">Quality</text:span>: Individual aspects of entities that cannot exist independently.</text:p>
      <text:p text:style-name="Text_20_body"><text:soft-page-break/><text:span text:style-name="T1">Examples:</text:span> - The specific yellowness of Dmitri’s skin (not yellowness in general) - The specific height of this building (not 180cm in general) - The specific beauty of this painting</text:p>
      <text:p text:style-name="Text_20_body"><text:span text:style-name="T1">Key relations:</text:span> - <text:span text:style-name="Source_5f_Text">isQualityOf</text:span>: Links quality to its bearer (entity) - <text:span text:style-name="Source_5f_Text">hasRegion</text:span>: Links quality to its value (region)</text:p>
      <text:p text:style-name="Text_20_body"><text:span text:style-name="T1">When to use Qualities:</text:span> DUL advises using Qualities only when <text:span text:style-name="T1">individual aspects matter</text:span>: - <text:span text:style-name="T1">Relevant</text:span>: Antique furniture appraisal (each piece’s individual patina, color, texture) - <text:span text:style-name="T1">Irrelevant</text:span>: Assembly line quality control (only conformance to design parameters matters)</text:p>
      <text:p text:style-name="Text_20_body">For most domains, direct attributes suffice. Qualities enable: - Fine-grained observation modeling - Temporal change tracking (same quality, different regions over time) - Multi-perspective measurement (same quality, different parameters)</text:p>
      <text:h text:style-name="Heading_20_3" text:outline-level="3"><text:bookmark-start text:name="situations"/>3.6 Situations<text:bookmark-end text:name="situations"/></text:h>
      <text:p text:style-name="First_20_paragraph"><text:span text:style-name="T1">Situation</text:span>: “A view, consistent with a Description, on a set of entities.”</text:p>
      <text:h text:style-name="Heading_20_4" text:outline-level="4"><text:bookmark-start text:name="dual-nature"/>Dual Nature:<text:bookmark-end text:name="dual-nature"/></text:h>
      <text:list xml:id="list2425163430" text:style-name="L10">
        <text:list-item>
          <text:p text:style-name="P10"><text:span text:style-name="T1">Epistemological</text:span>: A framed interpretation of reality</text:p>
          <text:list text:style-name="L11">
            <text:list-item>
              <text:p text:style-name="P11">Created by observers applying conceptual frames</text:p>
            </text:list-item>
            <text:list-item>
              <text:p text:style-name="P11">Multiple Situations can include the same entities (different framings)</text:p>
            </text:list-item>
          </text:list>
        </text:list-item>
        <text:list-item>
          <text:p text:style-name="P10"><text:span text:style-name="T1">Technical</text:span>: Reified n-ary relations</text:p>
          <text:list text:style-name="L12">
            <text:list-item>
              <text:p text:style-name="P12">Binary relations project from Situations via <text:span text:style-name="Source_5f_Text">isSettingFor</text:span></text:p>
            </text:list-item>
            <text:list-item>
              <text:p text:style-name="P12">Enables time-indexing and parameter-based relations</text:p>
            </text:list-item>
          </text:list>
        </text:list-item>
      </text:list>
      <text:h text:style-name="Heading_20_4" text:outline-level="4"><text:bookmark-start text:name="key-subclasses-1"/>Key Subclasses:<text:bookmark-end text:name="key-subclasses-1"/></text:h>
      <text:p text:style-name="First_20_paragraph"><text:span text:style-name="T1">TimeIndexedRelation</text:span> - Situations specifically for temporal context - <text:span text:style-name="T1">Classification</text:span>: Time-indexed concept-entity classification - <text:span text:style-name="T1">Parthood</text:span>: Time-indexed part-whole relations</text:p>
      <text:p text:style-name="Text_20_body"><text:span text:style-name="T1">PlanExecution</text:span> - Situation of executing a Plan - Links Actions to Tasks, Agents to Roles</text:p>
      <text:p text:style-name="Text_20_body"><text:span text:style-name="T1">WorkflowExecution</text:span> - Situation of executing a Workflow - Temporal sequencing of tasks</text:p>
      <text:p text:style-name="Text_20_body"><text:span text:style-name="T1">Transition</text:span> - Situation of change between states</text:p>
      <text:h text:style-name="Heading_20_3" text:outline-level="3"><text:bookmark-start text:name="informationentity"/>3.7 InformationEntity<text:bookmark-end text:name="informationentity"/></text:h>
      <text:p text:style-name="First_20_paragraph"><text:span text:style-name="T1">InformationEntity</text:span>: A catchall for information, abstract or concrete.</text:p>
      <text:p text:style-name="Text_20_body"><text:span text:style-name="T1">Motivation</text:span>: Bypass ambiguities in ordinary language: - “The 3rd Gymnopedie” could mean the composition (abstract) or a particular recording (concrete) - InformationEntity covers both, allowing underspecification when convenient</text:p>
      <text:p text:style-name="Text_20_body"><text:span text:style-name="T1">Subclasses:</text:span> - <text:span text:style-name="T1">InformationObject</text:span> (Abstract): The information content - <text:span text:style-name="T1">InformationRealization</text:span> (Concrete): Physical/event realization</text:p>
      <text:p text:style-name="Text_20_body"><text:span text:style-name="T1">Relation</text:span>: <text:span text:style-name="Source_5f_Text">realizes</text:span> connects realization to object</text:p>
      <text:h text:style-name="Heading_20_3" text:outline-level="3"><text:bookmark-start text:name="objectaggregate"/><text:soft-page-break/>3.8 ObjectAggregate<text:bookmark-end text:name="objectaggregate"/></text:h>
      <text:p text:style-name="First_20_paragraph"><text:span text:style-name="T1">ObjectAggregate</text:span>: Aggregates of distributed objects from a Collection.</text:p>
      <text:p text:style-name="Text_20_body"><text:span text:style-name="T1">Distinction:</text:span> - <text:span text:style-name="T1">Collection</text:span>: First-order entity (a social object unifying members conceptually) - <text:span text:style-name="T1">ObjectAggregate</text:span>: The distributed physical aggregate of members - <text:span text:style-name="T1">Set</text:span>: Second-order formal entity (abstract set in mathematical sense)</text:p>
      <text:p text:style-name="Text_20_body"><text:span text:style-name="T1">Example:</text:span> - <text:span text:style-name="T1">Collection</text:span>: “The Louvre Egyptian collection” (institutional concept) - <text:span text:style-name="T1">ObjectAggregate</text:span>: The physical artifacts distributed in display cases - <text:span text:style-name="T1">Set</text:span>: The mathematical set {artifact₁, artifact₂, …}</text:p>
      <text:p text:style-name="Horizontal_20_Line"/>
      <text:h text:style-name="Heading_20_2" text:outline-level="2"><text:bookmark-start text:name="iv.-context-modeling-framework"/>IV. Context Modeling Framework<text:bookmark-end text:name="iv.-context-modeling-framework"/></text:h>
      <text:h text:style-name="Heading_20_3" text:outline-level="3"><text:bookmark-start text:name="what-is-context-in-dul"/>4.1 What is Context in DUL?<text:bookmark-end text:name="what-is-context-in-dul"/></text:h>
      <text:p text:style-name="First_20_paragraph">DUL provides rich machinery for <text:span text:style-name="T1">context-sensitive modeling</text:span>—representing how facts and relations depend on: - <text:span text:style-name="T1">Temporal context</text:span>: When does this relation hold? - <text:span text:style-name="T1">Conceptual context</text:span>: Under what theory/frame is this interpreted? - <text:span text:style-name="T1">Social context</text:span>: Within what institution/agreement is this valid?</text:p>
      <text:p text:style-name="Text_20_body">The primary mechanism is the <text:span text:style-name="T1">Situation</text:span> class and related patterns.</text:p>
      <text:h text:style-name="Heading_20_3" text:outline-level="3"><text:bookmark-start text:name="the-situation-pattern"/>4.2 The Situation Pattern<text:bookmark-end text:name="the-situation-pattern"/></text:h>
      <text:h text:style-name="Heading_20_4" text:outline-level="4"><text:bookmark-start text:name="core-structure"/>Core Structure:<text:bookmark-end text:name="core-structure"/></text:h>
      <text:p text:style-name="Preformatted_20_Text">Situation --satisfies--&gt; Description</text:p>
      <text:p text:style-name="Preformatted_20_Text"><text:s text:c="10"/>--isSettingFor--&gt; Entity (multiple)</text:p>
      <text:p text:style-name="First_20_paragraph"><text:span text:style-name="T1">A Situation:</text:span> - Includes multiple entities (via <text:span text:style-name="Source_5f_Text">isSettingFor</text:span> and subproperties) - Satisfies a Description (the conceptual frame) - Has a coherent identity as a contextualized view</text:p>
      <text:h text:style-name="Heading_20_4" text:outline-level="4"><text:bookmark-start text:name="example-coffee-preparation"/>Example: Coffee Preparation<text:bookmark-end text:name="example-coffee-preparation"/></text:h>
      <text:p text:style-name="First_20_paragraph"><text:span text:style-name="T1">Situation</text:span>: “My coffee preparation this morning” - <text:span text:style-name="T1">satisfies</text:span>: Recipe Description (defines roles, tasks, ingredients) - <text:span text:style-name="T1">includesAgent</text:span>: Me (as baker role) - <text:span text:style-name="T1">includesAction</text:span>: Grinding action, brewing action - <text:span text:style-name="T1">includesObject</text:span>: Coffee beans, water, coffee maker - <text:span text:style-name="T1">includesTime</text:span>: This morning (8:00-8:15 AM)</text:p>
      <text:p text:style-name="Text_20_body">The Situation <text:span text:style-name="T1">unifies</text:span> these entities into a coherent context, interpreted through the Recipe frame.</text:p>
      <text:h text:style-name="Heading_20_3" text:outline-level="3"><text:bookmark-start text:name="descriptions-conceptual-contexts"/>4.3 Descriptions: Conceptual Contexts<text:bookmark-end text:name="descriptions-conceptual-contexts"/></text:h>
      <text:p text:style-name="First_20_paragraph"><text:span text:style-name="T1">Description</text:span> is the most important SocialObject subclass—it represents <text:span text:style-name="T1">conceptualizations</text:span>.</text:p>
      <text:h text:style-name="Heading_20_4" text:outline-level="4"><text:bookmark-start text:name="types-of-descriptions"/><text:soft-page-break/>Types of Descriptions:<text:bookmark-end text:name="types-of-descriptions"/></text:h>
      <text:p text:style-name="First_20_paragraph"><text:span text:style-name="T1">Plan</text:span> - Describes actions to be executed - Defines roles (who), tasks (what), parameters (how) - Example: Project plan, recipe, travel itinerary - <text:span text:style-name="T1">Specializations</text:span>: Project, Workflow</text:p>
      <text:p text:style-name="Text_20_body"><text:span text:style-name="T1">Design</text:span> - Describes structure and function - Provides rationale for entity construction - Example: Architectural design, software design, mechanism design</text:p>
      <text:p text:style-name="Text_20_body"><text:span text:style-name="T1">Diagnosis</text:span> - Describes system state for control or explanation - Example: Medical diagnosis, fault diagnosis, situation assessment</text:p>
      <text:p text:style-name="Text_20_body"><text:span text:style-name="T1">Norm</text:span> - Describes social rules and obligations - Example: Traffic law, ethical code, institutional policy</text:p>
      <text:p text:style-name="Text_20_body"><text:span text:style-name="T1">Contract</text:span> - Describes agreements between parties - Defines roles (parties) and tasks (obligations) - Example: Employment contract, treaty, license</text:p>
      <text:p text:style-name="Text_20_body"><text:span text:style-name="T1">Goal</text:span> - Describes desired situation - Typically associated with Plan for achievement - Example: Business objective, personal aspiration</text:p>
      <text:p text:style-name="Text_20_body"><text:span text:style-name="T1">Theory</text:span> - Describes general conceptual framework - Example: Scientific theory, philosophical system</text:p>
      <text:p text:style-name="Text_20_body"><text:span text:style-name="T1">Narrative</text:span> - Describes event sequences and their interpretation - Example: Historical account, story, case study</text:p>
      <text:h text:style-name="Heading_20_4" text:outline-level="4"><text:bookmark-start text:name="the-defines-relation"/>The defines Relation<text:bookmark-end text:name="the-defines-relation"/></text:h>
      <text:p text:style-name="First_20_paragraph">Descriptions <text:span text:style-name="T1">define</text:span> Concepts:</text:p>
      <text:p text:style-name="Preformatted_20_Text">Description --defines--&gt; Concept</text:p>
      <text:p text:style-name="Preformatted_20_Text">Concept --isDefinedIn--&gt; Description</text:p>
      <text:p text:style-name="First_20_paragraph">Example: - Recipe (Description) defines “Ingredient” (Role), “Mixing” (Task) - Traffic Law (Norm) defines “Driver” (Role), “Vehicle” (Concept)</text:p>
      <text:h text:style-name="Heading_20_4" text:outline-level="4"><text:bookmark-start text:name="the-satisfies-relation"/>The satisfies Relation<text:bookmark-end text:name="the-satisfies-relation"/></text:h>
      <text:p text:style-name="First_20_paragraph">Situations <text:span text:style-name="T1">satisfy</text:span> Descriptions:</text:p>
      <text:p text:style-name="Preformatted_20_Text">Situation --satisfies--&gt; Description</text:p>
      <text:p text:style-name="Preformatted_20_Text">Description --isSatisfiedBy--&gt; Situation</text:p>
      <text:p text:style-name="First_20_paragraph">Example: - My coffee preparation (Situation) satisfies the recipe (Plan) - Today’s traffic (Situation) satisfies (or violates) traffic law (Norm)</text:p>
      <text:h text:style-name="Heading_20_3" text:outline-level="3"><text:bookmark-start text:name="classification-concept-based-contexts"/>4.4 Classification: Concept-Based Contexts<text:bookmark-end text:name="classification-concept-based-contexts"/></text:h>
      <text:p text:style-name="First_20_paragraph"><text:span text:style-name="T1">Classification</text:span> is a special Situation subclass for <text:span text:style-name="T1">time-indexed classification</text:span>:</text:p>
      <text:p text:style-name="Preformatted_20_Text">Classification (a Situation)</text:p>
      <text:p text:style-name="Preformatted_20_Text"><text:s text:c="2"/>--satisfies--&gt; Description (defines the Concept)</text:p>
      <text:p text:style-name="Preformatted_20_Text"><text:s text:c="2"/>--isSettingFor--&gt; Entity (the classified entity)</text:p>
      <text:p text:style-name="Preformatted_20_Text"><text:s text:c="2"/>--isSettingFor--&gt; Concept (the classifying concept)</text:p>
      <text:p text:style-name="Preformatted_20_Text"><text:s text:c="2"/>--isSettingFor--&gt; TimeInterval (when classification holds)</text:p>
      <text:h text:style-name="Heading_20_4" text:outline-level="4"><text:bookmark-start text:name="why-classification-as-situation"/><text:soft-page-break/>Why Classification as Situation?<text:bookmark-end text:name="why-classification-as-situation"/></text:h>
      <text:p text:style-name="First_20_paragraph">Direct relation <text:span text:style-name="Source_5f_Text">Concept classifies Entity</text:span> is atemporal and acontextual. But: - Classifications change over time: “John is a student (in 2020), then a teacher (in 2024)” - Classifications depend on context: “This object is furniture (in museum), but art (in gallery)”</text:p>
      <text:p text:style-name="Text_20_body"><text:span text:style-name="T1">Solution</text:span>: Reify classification as a Situation: - <text:span text:style-name="T1">Simple</text:span>: <text:span text:style-name="Source_5f_Text">Concept 'Student' classifies Entity 'John'</text:span> (timeless) - <text:span text:style-name="T1">Contextual</text:span>: Classification Situation satisfying University Description, including John, ‘Student’ concept, and TimeInterval ‘2020-2024’</text:p>
      <text:h text:style-name="Heading_20_3" text:outline-level="3"><text:bookmark-start text:name="parthood-mereological-contexts"/>4.5 Parthood: Mereological Contexts<text:bookmark-end text:name="parthood-mereological-contexts"/></text:h>
      <text:p text:style-name="First_20_paragraph">DUL provides time-indexed parthood through the <text:span text:style-name="T1">Parthood</text:span> Situation:</text:p>
      <text:p text:style-name="Preformatted_20_Text">Parthood (a TimeIndexedRelation)</text:p>
      <text:p text:style-name="Preformatted_20_Text"><text:s text:c="2"/>--includesWhole--&gt; Entity (the whole)</text:p>
      <text:p text:style-name="Preformatted_20_Text"><text:s text:c="2"/>--includesPart--&gt; Entity (the part)</text:p>
      <text:p text:style-name="Preformatted_20_Text"><text:s text:c="2"/>--includesTime--&gt; TimeInterval (when parthood holds)</text:p>
      <text:h text:style-name="Heading_20_4" text:outline-level="4"><text:bookmark-start text:name="why-time-indexed-parthood"/>Why Time-Indexed Parthood?<text:bookmark-end text:name="why-time-indexed-parthood"/></text:h>
      <text:p text:style-name="First_20_paragraph">Parts change: - “My bike has a luggage rack (since March 29, 2021)” - “This ship had a mast (until the storm destroyed it)”</text:p>
      <text:p text:style-name="Text_20_body">Direct <text:span text:style-name="Source_5f_Text">hasPart</text:span> relation is timeless. Parthood Situation adds temporal context.</text:p>
      <text:h text:style-name="Heading_20_4" text:outline-level="4"><text:bookmark-start text:name="multiple-parthood-relations"/>Multiple Parthood Relations<text:bookmark-end text:name="multiple-parthood-relations"/></text:h>
      <text:p text:style-name="First_20_paragraph">DUL distinguishes several mereological relations:</text:p>
      <text:p text:style-name="Text_20_body"><text:span text:style-name="T1">hasPart / isPartOf</text:span> - Reflexive + transitive (classical mereology) - “The body has a brain as part” - “2024 is part of the 21st century”</text:p>
      <text:p text:style-name="Text_20_body"><text:span text:style-name="T1">hasProperPart / isProperPartOf</text:span> - Transitive + asymmetric (irreflexive) - Strict parthood (part ≠ whole)</text:p>
      <text:p text:style-name="Text_20_body"><text:span text:style-name="T1">hasComponent / isComponentOf</text:span> - Asymmetric (not transitive) - For designed systems with structural roles - “The car has an engine as component”</text:p>
      <text:p text:style-name="Text_20_body"><text:span text:style-name="T1">hasConstituent / isConstituentOf</text:span> - Cross-layer parthood - Links entities from different ontological strata - “The person has molecules as constituents” - “The social system has persons as constituents”</text:p>
      <text:h text:style-name="Heading_20_3" text:outline-level="3"><text:bookmark-start text:name="n-ary-relation-reification"/>4.6 N-ary Relation Reification<text:bookmark-end text:name="n-ary-relation-reification"/></text:h>
      <text:p text:style-name="First_20_paragraph">Standard ontologies struggle with n-ary relations (more than 2 participants): - <text:span text:style-name="T1">Traditional</text:span>: “John gave Mary a book on Tuesday” — how to model?</text:p>
      <text:p text:style-name="Text_20_body"><text:span text:style-name="T1">DUL Solution</text:span>: Use Situation as a reified relation:</text:p>
      <text:p text:style-name="Preformatted_20_Text">Situation: Giving₁</text:p>
      <text:p text:style-name="Preformatted_20_Text"><text:s text:c="2"/>--satisfies--&gt; GivingDescription</text:p>
      <text:p text:style-name="Preformatted_20_Text"><text:s text:c="2"/>--includesAgent--&gt; John (giver)</text:p>
      <text:p text:style-name="Preformatted_20_Text"><text:s text:c="2"/>--includesAgent--&gt; Mary (receiver)</text:p>
      <text:p text:style-name="Preformatted_20_Text"><text:soft-page-break/><text:s text:c="2"/>--includesObject--&gt; Book₁ (transferred object)</text:p>
      <text:p text:style-name="Preformatted_20_Text"><text:s text:c="2"/>--includesTime--&gt; Tuesday (when)</text:p>
      <text:p text:style-name="First_20_paragraph">All binary relations project from the Situation via <text:span text:style-name="Source_5f_Text">isSettingFor</text:span> (and subproperties like <text:span text:style-name="Source_5f_Text">includesAgent</text:span>).</text:p>
      <text:p text:style-name="Text_20_body"><text:span text:style-name="T1">Advantages:</text:span> - Arbitrary arity (any number of participants) - Add context freely (time, place, conditions) - Attach qualifications (degree, modality, evidentiality)</text:p>
      <text:h text:style-name="Heading_20_3" text:outline-level="3"><text:bookmark-start text:name="practical-context-modeling-examples"/>4.7 Practical Context Modeling Examples<text:bookmark-end text:name="practical-context-modeling-examples"/></text:h>
      <text:h text:style-name="Heading_20_4" text:outline-level="4"><text:bookmark-start text:name="example-1-role-based-context"/>Example 1: Role-Based Context<text:bookmark-end text:name="example-1-role-based-context"/></text:h>
      <text:p text:style-name="First_20_paragraph"><text:span text:style-name="T1">Scenario</text:span>: “John is a professor at MIT in 2024”</text:p>
      <text:p text:style-name="Text_20_body"><text:span text:style-name="T1">Model</text:span>:</text:p>
      <text:p text:style-name="Preformatted_20_Text">Classification₁ (Situation)</text:p>
      <text:p text:style-name="Preformatted_20_Text"><text:s text:c="2"/>--satisfies--&gt; AcademicStructure (Description defining 'Professor' Role)</text:p>
      <text:p text:style-name="Preformatted_20_Text"><text:s text:c="2"/>--isSettingFor--&gt; John (Person)</text:p>
      <text:p text:style-name="Preformatted_20_Text"><text:s text:c="2"/>--isSettingFor--&gt; 'Professor' (Role)</text:p>
      <text:p text:style-name="Preformatted_20_Text"><text:s text:c="2"/>--isSettingFor--&gt; MIT (Organization)</text:p>
      <text:p text:style-name="Preformatted_20_Text"><text:s text:c="2"/>--isSettingFor--&gt; TimeInterval₂₀₂₄</text:p>
      <text:p text:style-name="First_20_paragraph">This captures: - What role (Professor) - Who plays it (John) - In what institution (MIT) - When (2024)</text:p>
      <text:h text:style-name="Heading_20_4" text:outline-level="4"><text:bookmark-start text:name="example-2-evolving-design-context"/>Example 2: Evolving Design Context<text:bookmark-end text:name="example-2-evolving-design-context"/></text:h>
      <text:p text:style-name="First_20_paragraph"><text:span text:style-name="T1">Scenario</text:span>: “An old cradle is refunctionalized as a flower pot”</text:p>
      <text:p text:style-name="Text_20_body"><text:span text:style-name="T1">Model</text:span>:</text:p>
      <text:p text:style-name="Preformatted_20_Text">OriginalSituation (satisfying Baby Furniture Design)</text:p>
      <text:p text:style-name="Preformatted_20_Text"><text:s text:c="2"/>--isSettingFor--&gt; Cradle₁</text:p>
      <text:p text:style-name="Preformatted_20_Text"><text:s text:c="2"/>--includesTime--&gt; HistoricalPeriod</text:p>
      <text:p text:style-name="Preformatted_20_Text"><text:s text:c="2"/>--satisfies--&gt; BabyFurnitureDesign (Description)</text:p>
      <text:p text:style-name="Preformatted_20_Text"><text:s text:c="4"/>--defines--&gt; 'Cradle' (Role)</text:p>
      <text:p text:style-name="Preformatted_20_Text"/>
      <text:p text:style-name="Preformatted_20_Text">RefunctionalizedSituation (satisfying Garden Decoration Design)</text:p>
      <text:p text:style-name="Preformatted_20_Text"><text:s text:c="2"/>--isSettingFor--&gt; Cradle₁ (same object!)</text:p>
      <text:p text:style-name="Preformatted_20_Text"><text:s text:c="2"/>--includesTime--&gt; CurrentPeriod</text:p>
      <text:p text:style-name="Preformatted_20_Text"><text:s text:c="2"/>--satisfies--&gt; GardenDecorationDesign (Description)</text:p>
      <text:p text:style-name="Preformatted_20_Text"><text:s text:c="4"/>--defines--&gt; 'FlowerPot' (Role)</text:p>
      <text:p text:style-name="First_20_paragraph">The same physical object (Cradle₁) participates in different Situations satisfying different Designs.</text:p>
      <text:h text:style-name="Heading_20_4" text:outline-level="4"><text:bookmark-start text:name="example-3-multi-perspective-event-analysis"/>Example 3: Multi-Perspective Event Analysis<text:bookmark-end text:name="example-3-multi-perspective-event-analysis"/></text:h>
      <text:p text:style-name="First_20_paragraph"><text:span text:style-name="T1">Scenario</text:span>: “An avalanche that may have been triggered intentionally”</text:p>
      <text:p text:style-name="Text_20_body"><text:span text:style-name="T1">Model</text:span>:</text:p>
      <text:p text:style-name="Preformatted_20_Text">Event: Avalanche₁</text:p>
      <text:p text:style-name="Preformatted_20_Text"/>
      <text:p text:style-name="Preformatted_20_Text">PhysicalSituation</text:p>
      <text:p text:style-name="Preformatted_20_Text"><text:soft-page-break/><text:s text:c="2"/>--isSettingFor--&gt; Avalanche₁</text:p>
      <text:p text:style-name="Preformatted_20_Text"><text:s text:c="2"/>--satisfies--&gt; PhysicsDescription (natural forces theory)</text:p>
      <text:p text:style-name="Preformatted_20_Text"/>
      <text:p text:style-name="Preformatted_20_Text">LegalSituation</text:p>
      <text:p text:style-name="Preformatted_20_Text"><text:s text:c="2"/>--isSettingFor--&gt; Avalanche₁</text:p>
      <text:p text:style-name="Preformatted_20_Text"><text:s text:c="2"/>--isSettingFor--&gt; SuspectPerson</text:p>
      <text:p text:style-name="Preformatted_20_Text"><text:s text:c="2"/>--satisfies--&gt; CriminalLawDescription (intentional causation theory)</text:p>
      <text:p text:style-name="First_20_paragraph">Same event, two interpretations, both valid in their respective descriptive contexts.</text:p>
      <text:h text:style-name="Heading_20_3" text:outline-level="3"><text:bookmark-start text:name="situation-vs.-context-conceptual-clarification"/>4.8 Situation vs. Context (Conceptual Clarification)<text:bookmark-end text:name="situation-vs.-context-conceptual-clarification"/></text:h>
      <text:p text:style-name="First_20_paragraph"><text:span text:style-name="T1">Situation</text:span> (DUL) ≈ <text:span text:style-name="T1">Context</text:span> (informal usage), but more precise:</text:p>
      <text:list xml:id="list1132242168" text:style-name="L13">
        <text:list-item>
          <text:p text:style-name="P13"><text:span text:style-name="T1">Context</text:span> (informal): Vague notion of “relevant circumstances”</text:p>
        </text:list-item>
        <text:list-item>
          <text:p text:style-name="P13"><text:span text:style-name="T1">Situation</text:span> (DUL): Formal reification with:</text:p>
          <text:list text:style-name="L14">
            <text:list-item>
              <text:p text:style-name="P14">Identity (a first-order entity)</text:p>
            </text:list-item>
            <text:list-item>
              <text:p text:style-name="P14">Structure (<text:span text:style-name="Source_5f_Text">isSettingFor</text:span> relations to included entities)</text:p>
            </text:list-item>
            <text:list-item>
              <text:p text:style-name="P14">Interpretation (satisfies a Description providing meaning)</text:p>
            </text:list-item>
          </text:list>
        </text:list-item>
      </text:list>
      <text:p text:style-name="First_20_paragraph">DUL’s Situations enable <text:span text:style-name="T1">context-aware reasoning</text:span>: - What entities are co-present in a context? (Follow <text:span text:style-name="Source_5f_Text">isSettingFor</text:span>) - What concepts apply in this context? (Check Description that is satisfied) - What are the temporal bounds of this context? (Check <text:span text:style-name="Source_5f_Text">includesTime</text:span>)</text:p>
      <text:p text:style-name="Horizontal_20_Line"/>
      <text:h text:style-name="Heading_20_2" text:outline-level="2"><text:bookmark-start text:name="v.-key-design-patterns"/>V. Key Design Patterns<text:bookmark-end text:name="v.-key-design-patterns"/></text:h>
      <text:h text:style-name="Heading_20_3" text:outline-level="3"><text:bookmark-start text:name="overview-of-dul-patterns"/>5.1 Overview of DUL Patterns<text:bookmark-end text:name="overview-of-dul-patterns"/></text:h>
      <text:p text:style-name="First_20_paragraph">DUL is not just a taxonomy but a <text:span text:style-name="T1">library of reusable patterns</text:span>. Each pattern solves a recurring modeling problem.</text:p>
      <text:p text:style-name="Text_20_body"><text:span text:style-name="T1">Major Patterns:</text:span> 1. Descriptions &amp; Situations (D&amp;S) 2. Quality-Region 3. Participation 4. Information Realization 5. Mereological Patterns 6. Classification 7. Place 8. Sequence</text:p>
      <text:h text:style-name="Heading_20_3" text:outline-level="3"><text:bookmark-start text:name="the-descriptions-situations-ds-pattern"/>5.2 The Descriptions &amp; Situations (D&amp;S) Pattern<text:bookmark-end text:name="the-descriptions-situations-ds-pattern"/></text:h>
      <text:p text:style-name="First_20_paragraph"><text:span text:style-name="T1">Problem</text:span>: How to model context-dependent relations and time-varying properties?</text:p>
      <text:p text:style-name="Text_20_body"><text:span text:style-name="T1">Solution</text:span>: Separate <text:span text:style-name="T1">intensional</text:span> (conceptual) and <text:span text:style-name="T1">extensional</text:span> (actual) aspects:</text:p>
      <text:p text:style-name="Preformatted_20_Text">Description (intensional)</text:p>
      <text:p text:style-name="Preformatted_20_Text"><text:s text:c="2"/>--defines--&gt; Concept, Role, Task, Parameter</text:p>
      <text:p text:style-name="Preformatted_20_Text"/>
      <text:p text:style-name="Preformatted_20_Text">Situation (extensional)</text:p>
      <text:p text:style-name="Preformatted_20_Text"><text:s text:c="2"/>--satisfies--&gt; Description</text:p>
      <text:p text:style-name="Preformatted_20_Text"><text:s text:c="2"/>--isSettingFor--&gt; Entity (classified, related, contextualized)</text:p>
      <text:p text:style-name="First_20_paragraph"><text:span text:style-name="T1">When to use:</text:span> - Role assignment: Agent plays Role in Situation - Task execution: Action executes Task in Situation - Time-indexed relations: Relations hold within temporal Situations - Multi-perspective modeling: Same entities, different Situations/Descriptions</text:p>
      <text:p text:style-name="P15">Example Pattern Instance:</text:p>
      <text:p text:style-name="Preformatted_20_Text"><text:soft-page-break/>Recipe (Plan, a Description)</text:p>
      <text:p text:style-name="Preformatted_20_Text"><text:s text:c="2"/>--defines--&gt; 'Ingredient' (Role)</text:p>
      <text:p text:style-name="Preformatted_20_Text"><text:s text:c="2"/>--defines--&gt; 'Mixing' (Task)</text:p>
      <text:p text:style-name="Preformatted_20_Text"/>
      <text:p text:style-name="Preformatted_20_Text">CookingSession (PlanExecution, a Situation)</text:p>
      <text:p text:style-name="Preformatted_20_Text"><text:s text:c="2"/>--satisfies--&gt; Recipe</text:p>
      <text:p text:style-name="Preformatted_20_Text"><text:s text:c="2"/>--includesAgent--&gt; Chef₁ (plays 'Cook' Role)</text:p>
      <text:p text:style-name="Preformatted_20_Text"><text:s text:c="2"/>--includesAction--&gt; Mixing₁ (executes 'Mixing' Task)</text:p>
      <text:p text:style-name="Preformatted_20_Text"><text:s text:c="2"/>--includesObject--&gt; Flour₁ (plays 'Ingredient' Role)</text:p>
      <text:h text:style-name="Heading_20_3" text:outline-level="3"><text:bookmark-start text:name="the-quality-region-pattern-1"/>5.3 The Quality-Region Pattern<text:bookmark-end text:name="the-quality-region-pattern-1"/></text:h>
      <text:p text:style-name="First_20_paragraph"><text:span text:style-name="T1">Problem</text:span>: How to model attributes with: - Multiple measurement systems - Temporal change - Observational relativity</text:p>
      <text:p text:style-name="Text_20_body"><text:span text:style-name="T1">Solution</text:span>: Reify attributes as Qualities, link to abstract Regions:</text:p>
      <text:p text:style-name="Preformatted_20_Text">Entity --hasQuality--&gt; Quality --hasRegion--&gt; Region</text:p>
      <text:p text:style-name="First_20_paragraph"><text:span text:style-name="T1">When to use:</text:span> - Scientific observation: Same phenomenon, different measurements - Individual aspects matter: Not just “height” but “this building’s height” - Parameterized constraints: Concepts constrain regions through parameters</text:p>
      <text:p text:style-name="P15">Example Pattern Instance:</text:p>
      <text:p text:style-name="Preformatted_20_Text">DmitrisSkin (Quality)</text:p>
      <text:p text:style-name="Preformatted_20_Text"><text:s text:c="2"/>--isQualityOf--&gt; Dmitri (Person)</text:p>
      <text:p text:style-name="Preformatted_20_Text"><text:s text:c="2"/>--hasRegion--&gt; Yellow₁ (SocialObjectAttribute / Color value)</text:p>
      <text:p text:style-name="Preformatted_20_Text"/>
      <text:p text:style-name="Preformatted_20_Text">MeasurementSituation</text:p>
      <text:p text:style-name="Preformatted_20_Text"><text:s text:c="2"/>--includesObject--&gt; Dmitri</text:p>
      <text:p text:style-name="Preformatted_20_Text"><text:s text:c="2"/>--includesQuality--&gt; DmitrisSkin</text:p>
      <text:p text:style-name="Preformatted_20_Text"><text:s text:c="2"/>--satisfies--&gt; ColorimetryDescription</text:p>
      <text:p text:style-name="Preformatted_20_Text"><text:s text:c="4"/>--defines--&gt; RGBParameter</text:p>
      <text:h text:style-name="Heading_20_3" text:outline-level="3"><text:bookmark-start text:name="the-participation-pattern"/>5.4 The Participation Pattern<text:bookmark-end text:name="the-participation-pattern"/></text:h>
      <text:p text:style-name="First_20_paragraph"><text:span text:style-name="T1">Problem</text:span>: How to link events and objects?</text:p>
      <text:p text:style-name="Text_20_body"><text:span text:style-name="T1">Solution</text:span>: Symmetric participation relation:</text:p>
      <text:p text:style-name="Preformatted_20_Text">Event --hasParticipant--&gt; Object</text:p>
      <text:p text:style-name="Preformatted_20_Text">Object --isParticipantIn--&gt; Event</text:p>
      <text:p text:style-name="First_20_paragraph"><text:span text:style-name="T1">Extensions:</text:span> - <text:span text:style-name="T1">Agent participation</text:span>: Action –hasParticipant–&gt; Agent (agent-specific) - <text:span text:style-name="T1">Co-participation</text:span>: Object –coparticipatesWith–&gt; Object (derived from shared event)</text:p>
      <text:p text:style-name="Text_20_body"><text:span text:style-name="T1">When to use:</text:span> - Event modeling: Who/what is involved? - Provenance: What events affected this object? - Social network analysis: Who co-participated in events?</text:p>
      <text:p text:style-name="P15">Example Pattern Instance:</text:p>
      <text:p text:style-name="Preformatted_20_Text">TennisMatch₁ (Event)</text:p>
      <text:p text:style-name="Preformatted_20_Text"><text:s text:c="2"/>--hasParticipant--&gt; Vitas (Agent)</text:p>
      <text:p text:style-name="Preformatted_20_Text"><text:s text:c="2"/>--hasParticipant--&gt; Jimmy (Agent)</text:p>
      <text:p text:style-name="Preformatted_20_Text"><text:s text:c="2"/>--hasParticipant--&gt; TennisBall₁ (Object)</text:p>
      <text:p text:style-name="Preformatted_20_Text"/>
      <text:p text:style-name="Preformatted_20_Text">Vitas --coparticipatesWith--&gt; Jimmy (inferred)</text:p>
      <text:h text:style-name="Heading_20_3" text:outline-level="3"><text:bookmark-start text:name="the-information-realization-pattern"/><text:soft-page-break/>5.5 The Information Realization Pattern<text:bookmark-end text:name="the-information-realization-pattern"/></text:h>
      <text:p text:style-name="First_20_paragraph"><text:span text:style-name="T1">Problem</text:span>: Distinguish abstract information from concrete manifestations.</text:p>
      <text:p text:style-name="Text_20_body"><text:span text:style-name="T1">Solution</text:span>: Two-level information model:</text:p>
      <text:p text:style-name="Preformatted_20_Text">InformationRealization --realizes--&gt; InformationObject --expresses--&gt; SocialObject</text:p>
      <text:p text:style-name="First_20_paragraph"><text:span text:style-name="T1">When to use:</text:span> - Cultural heritage: Work vs. manifestations (FRBR-compatible) - Legal documents: Legal content vs. physical copies - Knowledge representation: Concepts vs. terms expressing them</text:p>
      <text:p text:style-name="P15">Example Pattern Instance:</text:p>
      <text:p text:style-name="Preformatted_20_Text">Constitution_ItalianRepublic (InformationObject)</text:p>
      <text:p text:style-name="Preformatted_20_Text"><text:s text:c="2"/>--expresses--&gt; ItalianLegalSystem (Description/Norm)</text:p>
      <text:p text:style-name="Preformatted_20_Text"/>
      <text:p text:style-name="Preformatted_20_Text">PhysicalCopy₁ (InformationRealization / PhysicalObject)</text:p>
      <text:p text:style-name="Preformatted_20_Text"><text:s text:c="2"/>--realizes--&gt; Constitution_ItalianRepublic</text:p>
      <text:p text:style-name="Preformatted_20_Text"/>
      <text:p text:style-name="Preformatted_20_Text">OralRecitation₁ (InformationRealization / Event)</text:p>
      <text:p text:style-name="Preformatted_20_Text"><text:s text:c="2"/>--realizes--&gt; Constitution_ItalianRepublic</text:p>
      <text:h text:style-name="Heading_20_3" text:outline-level="3"><text:bookmark-start text:name="mereological-patterns"/>5.6 Mereological Patterns<text:bookmark-end text:name="mereological-patterns"/></text:h>
      <text:p text:style-name="First_20_paragraph"><text:span text:style-name="T1">Problem</text:span>: Model part-whole relations with different characteristics.</text:p>
      <text:p text:style-name="Text_20_body"><text:span text:style-name="T1">Solution</text:span>: Multiple parthood properties:</text:p>
      <text:p text:style-name="P15">Pattern A: Reflexive Part-Whole</text:p>
      <text:p text:style-name="Preformatted_20_Text">Entity --hasPart--&gt; Entity (reflexive, transitive)</text:p>
      <text:p text:style-name="First_20_paragraph">Use when: General decomposition, entity is part of itself (mereologically valid)</text:p>
      <text:p text:style-name="P15">Pattern B: Proper Part-Whole</text:p>
      <text:p text:style-name="Preformatted_20_Text">Entity --hasProperPart--&gt; Entity (asymmetric, transitive)</text:p>
      <text:p text:style-name="First_20_paragraph">Use when: Strict decomposition, part ≠ whole</text:p>
      <text:p text:style-name="P15">Pattern C: Component-System</text:p>
      <text:p text:style-name="Preformatted_20_Text">Object --hasComponent--&gt; Object (asymmetric, NOT transitive)</text:p>
      <text:p text:style-name="First_20_paragraph">Use when: Designed artifacts with direct structural components</text:p>
      <text:p text:style-name="P15">Pattern D: Constitution</text:p>
      <text:p text:style-name="Preformatted_20_Text">Entity --hasConstituent--&gt; Entity (cross-layer)</text:p>
      <text:p text:style-name="First_20_paragraph">Use when: Different ontological strata (social/physical, organism/molecular)</text:p>
      <text:p text:style-name="P15">Example Pattern Instance:</text:p>
      <text:p text:style-name="Preformatted_20_Text">Car₁ (DesignedArtifact)</text:p>
      <text:p text:style-name="Preformatted_20_Text"><text:s text:c="2"/>--hasComponent--&gt; Engine₁ (direct component)</text:p>
      <text:p text:style-name="Preformatted_20_Text"><text:s text:c="2"/>--hasComponent--&gt; Wheel₁ (direct component)</text:p>
      <text:p text:style-name="Preformatted_20_Text"/>
      <text:p text:style-name="Preformatted_20_Text">Engine₁</text:p>
      <text:p text:style-name="Preformatted_20_Text"><text:s text:c="2"/>--hasProperPart--&gt; Piston₁ (engine part)</text:p>
      <text:p text:style-name="Preformatted_20_Text"/>
      <text:p text:style-name="Preformatted_20_Text"><text:soft-page-break/>Car₁ --hasPart--&gt; Piston₁ (inferred via transitivity of hasPart, if rules applied)</text:p>
      <text:p text:style-name="Preformatted_20_Text"/>
      <text:p text:style-name="Preformatted_20_Text">Person₁ (BiologicalObject)</text:p>
      <text:p text:style-name="Preformatted_20_Text"><text:s text:c="2"/>--hasConstituent--&gt; Molecule₁ (cross-layer: organism → molecular)</text:p>
      <text:h text:style-name="Heading_20_3" text:outline-level="3"><text:bookmark-start text:name="the-classification-pattern"/>5.7 The Classification Pattern<text:bookmark-end text:name="the-classification-pattern"/></text:h>
      <text:p text:style-name="First_20_paragraph"><text:span text:style-name="T1">Problem</text:span>: Context and time-dependent classification.</text:p>
      <text:p text:style-name="Text_20_body"><text:span text:style-name="T1">Solution</text:span>: Classification as a special Situation:</text:p>
      <text:p text:style-name="Preformatted_20_Text">Classification (TimeIndexedRelation)</text:p>
      <text:p text:style-name="Preformatted_20_Text"><text:s text:c="2"/>--satisfies--&gt; Description (defines Concept)</text:p>
      <text:p text:style-name="Preformatted_20_Text"><text:s text:c="2"/>--isSettingFor--&gt; Concept (classifier)</text:p>
      <text:p text:style-name="Preformatted_20_Text"><text:s text:c="2"/>--isSettingFor--&gt; Entity (classified)</text:p>
      <text:p text:style-name="Preformatted_20_Text"><text:s text:c="2"/>--isSettingFor--&gt; TimeInterval (when)</text:p>
      <text:p text:style-name="First_20_paragraph"><text:span text:style-name="T1">When to use:</text:span> - Role assignment: Agents play different roles at different times - Taxonomic classification: Species membership, artifact categories - Status tracking: Legal status, health status, employment status over time</text:p>
      <text:p text:style-name="P15">Example Pattern Instance:</text:p>
      <text:p text:style-name="Preformatted_20_Text">Classification₁</text:p>
      <text:p text:style-name="Preformatted_20_Text"><text:s text:c="2"/>--satisfies--&gt; TrafficLaw (Norm defining vehicle types)</text:p>
      <text:p text:style-name="Preformatted_20_Text"><text:s text:c="2"/>--isSettingFor--&gt; Vehicle₁ (Entity)</text:p>
      <text:p text:style-name="Preformatted_20_Text"><text:s text:c="2"/>--isSettingFor--&gt; 'Truck' (Concept)</text:p>
      <text:p text:style-name="Preformatted_20_Text"><text:s text:c="2"/>--isSettingFor--&gt; Interval₂₀₂₄ (when registered as truck)</text:p>
      <text:p text:style-name="Preformatted_20_Text"/>
      <text:p text:style-name="Preformatted_20_Text">Classification₂</text:p>
      <text:p text:style-name="Preformatted_20_Text"><text:s text:c="2"/>--satisfies--&gt; HistoricalArchive (Description)</text:p>
      <text:p text:style-name="Preformatted_20_Text"><text:s text:c="2"/>--isSettingFor--&gt; Vehicle₁ (same entity)</text:p>
      <text:p text:style-name="Preformatted_20_Text"><text:s text:c="2"/>--isSettingFor--&gt; 'ClassicCar' (different Concept)</text:p>
      <text:p text:style-name="Preformatted_20_Text"><text:s text:c="2"/>--isSettingFor--&gt; Interval₂₀₃₀ (after retirement from service)</text:p>
      <text:h text:style-name="Heading_20_3" text:outline-level="3"><text:bookmark-start text:name="the-place-pattern"/>5.8 The Place Pattern<text:bookmark-end text:name="the-place-pattern"/></text:h>
      <text:p text:style-name="First_20_paragraph"><text:span text:style-name="T1">Problem</text:span>: Locations are both physical and social constructs.</text:p>
      <text:p text:style-name="Text_20_body"><text:span text:style-name="T1">Solution</text:span>: Distinguish PhysicalPlace and Place:</text:p>
      <text:p text:style-name="Preformatted_20_Text">PhysicalPlace (PhysicalObject)</text:p>
      <text:p text:style-name="Preformatted_20_Text"><text:s text:c="2"/>--hasSpaceRegion--&gt; SpaceRegion (geometric location)</text:p>
      <text:p text:style-name="Preformatted_20_Text"/>
      <text:p text:style-name="Preformatted_20_Text">Place (SocialObject)</text:p>
      <text:p text:style-name="Preformatted_20_Text"><text:s text:c="2"/>--isExpressedBy--&gt; InformationObject (social definition)</text:p>
      <text:p text:style-name="Preformatted_20_Text"><text:s text:c="2"/>--describes--&gt; PhysicalPlace (optional)</text:p>
      <text:p text:style-name="First_20_paragraph"><text:span text:style-name="T1">When to use:</text:span> - Physical location: Coordinates, geometric regions - Social/administrative places: Countries, neighborhoods, institutions - Hybrid: “Paris” is both a geographic region and a social construct</text:p>
      <text:p text:style-name="P15">Example Pattern Instance:</text:p>
      <text:p text:style-name="Preformatted_20_Text">Paris_Geographic (PhysicalPlace)</text:p>
      <text:p text:style-name="Preformatted_20_Text"><text:s text:c="2"/>--hasSpaceRegion--&gt; Region48.8566N_2.3522E</text:p>
      <text:p text:style-name="Preformatted_20_Text"/>
      <text:p text:style-name="Preformatted_20_Text">Paris_City (Place, SocialObject)</text:p>
      <text:p text:style-name="Preformatted_20_Text"><text:s text:c="2"/>--isExpressedBy--&gt; ParisCharter (InformationObject / legal document)</text:p>
      <text:p text:style-name="Preformatted_20_Text"><text:soft-page-break/><text:s text:c="2"/>--describes--&gt; Paris_Geographic</text:p>
      <text:p text:style-name="Preformatted_20_Text"><text:s text:c="2"/>--isMemberOf--&gt; FrenchCities (Collection)</text:p>
      <text:h text:style-name="Heading_20_3" text:outline-level="3"><text:bookmark-start text:name="the-sequence-pattern"/>5.9 The Sequence Pattern<text:bookmark-end text:name="the-sequence-pattern"/></text:h>
      <text:p text:style-name="First_20_paragraph"><text:span text:style-name="T1">Problem</text:span>: Model temporal or logical ordering.</text:p>
      <text:p text:style-name="Text_20_body"><text:span text:style-name="T1">Solution</text:span>: Precedence relations:</text:p>
      <text:p text:style-name="Preformatted_20_Text">Entity --precedes--&gt; Entity (transitive)</text:p>
      <text:p text:style-name="Preformatted_20_Text">Entity --directlyPrecedes--&gt; Entity (intransitive, strict adjacency)</text:p>
      <text:p text:style-name="First_20_paragraph"><text:span text:style-name="T1">When to use:</text:span> - Workflow: Task sequences - Narrative: Event chronology - Procedure: Step ordering</text:p>
      <text:p text:style-name="P15">Example Pattern Instance:</text:p>
      <text:p text:style-name="Preformatted_20_Text">Workflow₁ (Description)</text:p>
      <text:p text:style-name="Preformatted_20_Text"><text:s text:c="2"/>--defines--&gt; Task₁, Task₂, Task₃</text:p>
      <text:p text:style-name="Preformatted_20_Text"/>
      <text:p text:style-name="Preformatted_20_Text">Task₁ --directlyPrecedes--&gt; Task₂</text:p>
      <text:p text:style-name="Preformatted_20_Text">Task₂ --directlyPrecedes--&gt; Task₃</text:p>
      <text:p text:style-name="Preformatted_20_Text"/>
      <text:p text:style-name="Preformatted_20_Text">Task₁ --precedes--&gt; Task₃ (inferred via transitivity)</text:p>
      <text:p text:style-name="Preformatted_20_Text"/>
      <text:p text:style-name="Preformatted_20_Text">WorkflowExecution₁ (Situation)</text:p>
      <text:p text:style-name="Preformatted_20_Text"><text:s text:c="2"/>--satisfies--&gt; Workflow₁</text:p>
      <text:p text:style-name="Preformatted_20_Text"><text:s text:c="2"/>--includesAction--&gt; Action₁ (executes Task₁)</text:p>
      <text:p text:style-name="Preformatted_20_Text"><text:s text:c="2"/>--includesAction--&gt; Action₂ (executes Task₂)</text:p>
      <text:p text:style-name="Preformatted_20_Text"><text:s text:c="2"/>--includesAction--&gt; Action₃ (executes Task₃)</text:p>
      <text:h text:style-name="Heading_20_3" text:outline-level="3"><text:bookmark-start text:name="pattern-composition"/>5.10 Pattern Composition<text:bookmark-end text:name="pattern-composition"/></text:h>
      <text:p text:style-name="First_20_paragraph">Real-world modeling typically <text:span text:style-name="T1">combines multiple patterns</text:span>:</text:p>
      <text:p text:style-name="P15">Example: Project Management Ontology</text:p>
      <text:p text:style-name="Text_20_body">Uses: 1. <text:span text:style-name="T1">D&amp;S</text:span>: Project (Plan) defines Roles/Tasks, ProjectExecution (Situation) satisfies Project 2. <text:span text:style-name="T1">Participation</text:span>: Actions have Agent participants 3. <text:span text:style-name="T1">Classification</text:span>: Agents classified by Roles (ProjectManager, Developer) 4. <text:span text:style-name="T1">Sequence</text:span>: Tasks ordered by precedence 5. <text:span text:style-name="T1">Quality-Region</text:span>: Project attributes (budget, timeline) as Qualities with Amount/TimeInterval Regions 6. <text:span text:style-name="T1">Mereological</text:span>: Project has sub-projects as proper parts</text:p>
      <text:p text:style-name="Text_20_body"><text:span text:style-name="T1">Pattern Integration Strategy:</text:span> 1. Identify core entities (agents, resources, activities) 2. Apply D&amp;S for role/task structure 3. Apply Participation for event-object links 4. Apply Classification for role assignment 5. Apply Sequence for workflow ordering 6. Apply Quality-Region for measurements/KPIs 7. Apply Mereology for hierarchical decomposition</text:p>
      <text:p text:style-name="Horizontal_20_Line"/>
      <text:h text:style-name="Heading_20_2" text:outline-level="2"><text:bookmark-start text:name="vi.-class-hierarchy-reference"/>VI. Class Hierarchy Reference<text:bookmark-end text:name="vi.-class-hierarchy-reference"/></text:h>
      <text:h text:style-name="Heading_20_3" text:outline-level="3"><text:bookmark-start text:name="complete-class-hierarchy"/>6.1 Complete Class Hierarchy<text:bookmark-end text:name="complete-class-hierarchy"/></text:h>
      <text:p text:style-name="Preformatted_20_Text">Entity</text:p>
      <text:p text:style-name="Preformatted_20_Text">├── Abstract</text:p>
      <text:p text:style-name="Preformatted_20_Text"><text:soft-page-break/>│ <text:s text:c="2"/>├── FormalEntity</text:p>
      <text:p text:style-name="Preformatted_20_Text">│ <text:s text:c="2"/>│ <text:s text:c="2"/>└── Set</text:p>
      <text:p text:style-name="Preformatted_20_Text">│ <text:s text:c="2"/>└── Region</text:p>
      <text:p text:style-name="Preformatted_20_Text">│ <text:s text:c="6"/>├── Amount</text:p>
      <text:p text:style-name="Preformatted_20_Text">│ <text:s text:c="6"/>├── PhysicalAttribute</text:p>
      <text:p text:style-name="Preformatted_20_Text">│ <text:s text:c="6"/>├── SocialObjectAttribute</text:p>
      <text:p text:style-name="Preformatted_20_Text">│ <text:s text:c="6"/>├── SpaceRegion</text:p>
      <text:p text:style-name="Preformatted_20_Text">│ <text:s text:c="6"/>├── SpatioTemporalRegion</text:p>
      <text:p text:style-name="Preformatted_20_Text">│ <text:s text:c="6"/>└── TimeInterval</text:p>
      <text:p text:style-name="Preformatted_20_Text">├── Event</text:p>
      <text:p text:style-name="Preformatted_20_Text">│ <text:s text:c="2"/>├── Action</text:p>
      <text:p text:style-name="Preformatted_20_Text">│ <text:s text:c="2"/>└── Process</text:p>
      <text:p text:style-name="Preformatted_20_Text">├── InformationEntity</text:p>
      <text:p text:style-name="Preformatted_20_Text">│ <text:s text:c="2"/>├── InformationObject</text:p>
      <text:p text:style-name="Preformatted_20_Text">│ <text:s text:c="2"/>└── InformationRealization</text:p>
      <text:p text:style-name="Preformatted_20_Text">├── Object</text:p>
      <text:p text:style-name="Preformatted_20_Text">│ <text:s text:c="2"/>├── Agent</text:p>
      <text:p text:style-name="Preformatted_20_Text">│ <text:s text:c="2"/>│ <text:s text:c="2"/>├── Person</text:p>
      <text:p text:style-name="Preformatted_20_Text">│ <text:s text:c="2"/>│ <text:s text:c="2"/>│ <text:s text:c="2"/>├── NaturalPerson</text:p>
      <text:p text:style-name="Preformatted_20_Text">│ <text:s text:c="2"/>│ <text:s text:c="2"/>│ <text:s text:c="2"/>└── SocialPerson</text:p>
      <text:p text:style-name="Preformatted_20_Text">│ <text:s text:c="2"/>│ <text:s text:c="2"/>├── PhysicalAgent</text:p>
      <text:p text:style-name="Preformatted_20_Text">│ <text:s text:c="2"/>│ <text:s text:c="2"/>│ <text:s text:c="2"/>└── Organism</text:p>
      <text:p text:style-name="Preformatted_20_Text">│ <text:s text:c="2"/>│ <text:s text:c="2"/>└── SocialAgent</text:p>
      <text:p text:style-name="Preformatted_20_Text">│ <text:s text:c="2"/>│ <text:s text:c="6"/>├── CollectiveAgent</text:p>
      <text:p text:style-name="Preformatted_20_Text">│ <text:s text:c="2"/>│ <text:s text:c="6"/>│ <text:s text:c="2"/>├── Community</text:p>
      <text:p text:style-name="Preformatted_20_Text">│ <text:s text:c="2"/>│ <text:s text:c="6"/>│ <text:s text:c="2"/>└── Group</text:p>
      <text:p text:style-name="Preformatted_20_Text">│ <text:s text:c="2"/>│ <text:s text:c="6"/>├── Organization</text:p>
      <text:p text:style-name="Preformatted_20_Text">│ <text:s text:c="2"/>│ <text:s text:c="6"/>└── Personification</text:p>
      <text:p text:style-name="Preformatted_20_Text">│ <text:s text:c="2"/>├── PhysicalObject</text:p>
      <text:p text:style-name="Preformatted_20_Text">│ <text:s text:c="2"/>│ <text:s text:c="2"/>├── PhysicalArtifact</text:p>
      <text:p text:style-name="Preformatted_20_Text">│ <text:s text:c="2"/>│ <text:s text:c="2"/>│ <text:s text:c="2"/>└── DesignedArtifact</text:p>
      <text:p text:style-name="Preformatted_20_Text">│ <text:s text:c="2"/>│ <text:s text:c="2"/>│ <text:s text:c="6"/>└── DesignedSubstance</text:p>
      <text:p text:style-name="Preformatted_20_Text">│ <text:s text:c="2"/>│ <text:s text:c="2"/>├── PhysicalBody</text:p>
      <text:p text:style-name="Preformatted_20_Text">│ <text:s text:c="2"/>│ <text:s text:c="2"/>│ <text:s text:c="2"/>├── BiologicalObject</text:p>
      <text:p text:style-name="Preformatted_20_Text">│ <text:s text:c="2"/>│ <text:s text:c="2"/>│ <text:s text:c="2"/>├── ChemicalObject</text:p>
      <text:p text:style-name="Preformatted_20_Text">│ <text:s text:c="2"/>│ <text:s text:c="2"/>│ <text:s text:c="2"/>└── Substance</text:p>
      <text:p text:style-name="Preformatted_20_Text">│ <text:s text:c="2"/>│ <text:s text:c="2"/>│ <text:s text:c="6"/>└── FunctionalSubstance</text:p>
      <text:p text:style-name="Preformatted_20_Text">│ <text:s text:c="2"/>│ <text:s text:c="2"/>└── PhysicalPlace</text:p>
      <text:p text:style-name="Preformatted_20_Text">│ <text:s text:c="2"/>└── SocialObject</text:p>
      <text:p text:style-name="Preformatted_20_Text">│ <text:s text:c="6"/>├── Collection</text:p>
      <text:p text:style-name="Preformatted_20_Text">│ <text:s text:c="6"/>│ <text:s text:c="2"/>├── Collective</text:p>
      <text:p text:style-name="Preformatted_20_Text">│ <text:s text:c="6"/>│ <text:s text:c="2"/>├── Configuration</text:p>
      <text:p text:style-name="Preformatted_20_Text">│ <text:s text:c="6"/>│ <text:s text:c="2"/>└── TypeCollection</text:p>
      <text:p text:style-name="Preformatted_20_Text">│ <text:s text:c="6"/>├── Concept</text:p>
      <text:p text:style-name="Preformatted_20_Text">│ <text:s text:c="6"/>│ <text:s text:c="2"/>├── EventType</text:p>
      <text:p text:style-name="Preformatted_20_Text">│ <text:s text:c="6"/>│ <text:s text:c="2"/>│ <text:s text:c="2"/>└── Task</text:p>
      <text:p text:style-name="Preformatted_20_Text">│ <text:s text:c="6"/>│ <text:s text:c="2"/>├── LocalConcept</text:p>
      <text:p text:style-name="Preformatted_20_Text">│ <text:s text:c="6"/>│ <text:s text:c="2"/>├── Parameter</text:p>
      <text:p text:style-name="Preformatted_20_Text">│ <text:s text:c="6"/>│ <text:s text:c="2"/>│ <text:s text:c="2"/>└── UnitOfMeasure</text:p>
      <text:p text:style-name="Preformatted_20_Text">│ <text:s text:c="6"/>│ <text:s text:c="2"/>└── Role</text:p>
      <text:p text:style-name="Preformatted_20_Text">│ <text:s text:c="6"/>├── Description</text:p>
      <text:p text:style-name="Preformatted_20_Text">│ <text:s text:c="6"/>│ <text:s text:c="2"/>├── Contract</text:p>
      <text:p text:style-name="Preformatted_20_Text">│ <text:s text:c="6"/>│ <text:s text:c="2"/>├── Design</text:p>
      <text:p text:style-name="Preformatted_20_Text">│ <text:s text:c="6"/>│ <text:s text:c="2"/>├── Diagnosis</text:p>
      <text:p text:style-name="Preformatted_20_Text">│ <text:s text:c="6"/>│ <text:s text:c="2"/>├── Goal</text:p>
      <text:p text:style-name="Preformatted_20_Text">│ <text:s text:c="6"/>│ <text:s text:c="2"/>├── Method</text:p>
      <text:p text:style-name="Preformatted_20_Text">│ <text:s text:c="6"/>│ <text:s text:c="2"/>├── Narrative</text:p>
      <text:p text:style-name="Preformatted_20_Text">│ <text:s text:c="6"/>│ <text:s text:c="2"/>├── Norm</text:p>
      <text:p text:style-name="Preformatted_20_Text"><text:soft-page-break/>│ <text:s text:c="6"/>│ <text:s text:c="2"/>├── Plan</text:p>
      <text:p text:style-name="Preformatted_20_Text">│ <text:s text:c="6"/>│ <text:s text:c="2"/>│ <text:s text:c="2"/>├── Project</text:p>
      <text:p text:style-name="Preformatted_20_Text">│ <text:s text:c="6"/>│ <text:s text:c="2"/>│ <text:s text:c="2"/>└── Workflow</text:p>
      <text:p text:style-name="Preformatted_20_Text">│ <text:s text:c="6"/>│ <text:s text:c="2"/>├── Relation</text:p>
      <text:p text:style-name="Preformatted_20_Text">│ <text:s text:c="6"/>│ <text:s text:c="2"/>│ <text:s text:c="2"/>├── Pattern</text:p>
      <text:p text:style-name="Preformatted_20_Text">│ <text:s text:c="6"/>│ <text:s text:c="2"/>│ <text:s text:c="2"/>└── SocialRelation</text:p>
      <text:p text:style-name="Preformatted_20_Text">│ <text:s text:c="6"/>│ <text:s text:c="2"/>├── Right</text:p>
      <text:p text:style-name="Preformatted_20_Text">│ <text:s text:c="6"/>│ <text:s text:c="2"/>└── Theory</text:p>
      <text:p text:style-name="Preformatted_20_Text">│ <text:s text:c="6"/>└── Place</text:p>
      <text:p text:style-name="Preformatted_20_Text">├── Quality</text:p>
      <text:p text:style-name="Preformatted_20_Text">└── Situation</text:p>
      <text:p text:style-name="Preformatted_20_Text"><text:s text:c="4"/>├── PlanExecution</text:p>
      <text:p text:style-name="Preformatted_20_Text"><text:s text:c="4"/>├── TimeIndexedRelation</text:p>
      <text:p text:style-name="Preformatted_20_Text"><text:s text:c="4"/>│ <text:s text:c="2"/>├── Classification</text:p>
      <text:p text:style-name="Preformatted_20_Text"><text:s text:c="4"/>│ <text:s text:c="2"/>└── Parthood</text:p>
      <text:p text:style-name="Preformatted_20_Text"><text:s text:c="4"/>├── Transition</text:p>
      <text:p text:style-name="Preformatted_20_Text"><text:s text:c="4"/>└── WorkflowExecution</text:p>
      <text:p text:style-name="Preformatted_20_Text"/>
      <text:p text:style-name="Preformatted_20_Text">ObjectAggregate (parallel hierarchy, not under Entity)</text:p>
      <text:h text:style-name="Heading_20_3" text:outline-level="3"><text:bookmark-start text:name="detailed-class-descriptions"/>6.2 Detailed Class Descriptions<text:bookmark-end text:name="detailed-class-descriptions"/></text:h>
      <text:h text:style-name="Heading_20_4" text:outline-level="4"><text:bookmark-start text:name="abstract-branch"/>Abstract Branch<text:bookmark-end text:name="abstract-branch"/></text:h>
      <text:p text:style-name="First_20_paragraph"><text:span text:style-name="T1">Abstract</text:span> - Entities not located in space-time - Mathematical entities, formal semantics, regions</text:p>
      <text:p text:style-name="Text_20_body"><text:span text:style-name="T1">FormalEntity</text:span> - Formally defined, independent of social context - “Platonic entities”: sets, categories, constants, variables - Distinguished from Concept (social) and InformationObject (localized)</text:p>
      <text:p text:style-name="Text_20_body"><text:span text:style-name="T1">Set</text:span> - Mathematical sets in the extensional sense - Second-order entities (classes as sets)</text:p>
      <text:p text:style-name="Text_20_body"><text:span text:style-name="T1">Region</text:span> - Values in dimensional spaces - For qualities to be measured/observed</text:p>
      <text:p text:style-name="Text_20_body"><text:span text:style-name="T1">Amount</text:span> - Quantities independent of measurement - Mass, volume, count, monetary amounts</text:p>
      <text:p text:style-name="Text_20_body"><text:span text:style-name="T1">PhysicalAttribute</text:span> - Physical dimensions: temperature, pressure, velocity, wavelength</text:p>
      <text:p text:style-name="Text_20_body"><text:span text:style-name="T1">SocialObjectAttribute</text:span> - Social dimensions: salary level, legal status, reputation score</text:p>
      <text:p text:style-name="Text_20_body"><text:span text:style-name="T1">SpaceRegion</text:span> - Spatial coordinates, geometries - Absolute locations</text:p>
      <text:p text:style-name="Text_20_body"><text:span text:style-name="T1">TimeInterval</text:span> - Temporal extents - Start/end points, durations</text:p>
      <text:p text:style-name="Text_20_body"><text:span text:style-name="T1">SpatioTemporalRegion</text:span> - Combined space-time regions - For events with spatial extent</text:p>
      <text:h text:style-name="Heading_20_4" text:outline-level="4"><text:bookmark-start text:name="event-branch"/>Event Branch<text:bookmark-end text:name="event-branch"/></text:h>
      <text:p text:style-name="First_20_paragraph"><text:span text:style-name="T1">Event</text:span> - Any physical, social, or mental process, event, or state - Has temporal extent - Has object participants - Aspectually neutral (use Situations for aspectual views)</text:p>
      <text:p text:style-name="Text_20_body"><text:span text:style-name="T1">Action</text:span> - Event with Agent participants - Executes Task (typically defined in Plan) - Intentional, goal-directed activity</text:p>
      <text:p text:style-name="Text_20_body"><text:soft-page-break/><text:span text:style-name="T1">Process</text:span> - Event without agentive focus (or non-human agents) - Natural processes: erosion, combustion, growth - Social processes: inflation, cultural change</text:p>
      <text:h text:style-name="Heading_20_4" text:outline-level="4"><text:bookmark-start text:name="informationentity-branch"/>InformationEntity Branch<text:bookmark-end text:name="informationentity-branch"/></text:h>
      <text:p text:style-name="First_20_paragraph"><text:span text:style-name="T1">InformationEntity</text:span> - Catchall for information (abstract or concrete) - Bypasses ambiguities in ordinary language</text:p>
      <text:p text:style-name="Text_20_body"><text:span text:style-name="T1">InformationObject</text:span> - Abstract information: musical compositions, texts, concepts - SocialObject (requires social context) - Expressed by symbols, realized by physical/event entities</text:p>
      <text:p text:style-name="Text_20_body"><text:span text:style-name="T1">InformationRealization</text:span> - Concrete realizations: written documents, performances, recordings - Can be PhysicalObject (book) or Event (performance) - Realizes InformationObject</text:p>
      <text:h text:style-name="Heading_20_4" text:outline-level="4"><text:bookmark-start text:name="object-branch"/>Object Branch<text:bookmark-end text:name="object-branch"/></text:h>
      <text:p text:style-name="First_20_paragraph"><text:span text:style-name="T1">Object</text:span> - Entities with spatial location - Participate in events - Can be physical or social</text:p>
      <text:h text:style-name="Heading_20_5" text:outline-level="5"><text:bookmark-start text:name="agent-subtree"/>Agent Subtree<text:bookmark-end text:name="agent-subtree"/></text:h>
      <text:p text:style-name="First_20_paragraph"><text:span text:style-name="T1">Agent</text:span> - Agentive objects (capable of intentional action) - Can play Roles, execute Tasks</text:p>
      <text:p text:style-name="Text_20_body"><text:span text:style-name="T1">PhysicalAgent</text:span> - Biological agents: organisms, natural persons - Physical basis for agency</text:p>
      <text:p text:style-name="Text_20_body"><text:span text:style-name="T1">Organism</text:span> - Biological objects with self-reproduction capability - Includes all living beings with agency</text:p>
      <text:p text:style-name="Text_20_body"><text:span text:style-name="T1">SocialAgent</text:span> - Socially constructed agents - Organizations, collective agents, personifications</text:p>
      <text:p text:style-name="Text_20_body"><text:span text:style-name="T1">Organization</text:span> - Internally structured, conventionally created agents - Requires specific Roles and Agents to act - Examples: companies, governments, institutions</text:p>
      <text:p text:style-name="Text_20_body"><text:span text:style-name="T1">CollectiveAgent</text:span> - Agents acted by members of a Collective - Less stable than Organizations (no dedicated internal structure) - Examples: social movements, action groups</text:p>
      <text:p text:style-name="Text_20_body"><text:span text:style-name="T1">Group</text:span> - CollectiveAgent with shared conceptualization of a SocialRelation - Coordinated intentionality - Examples: committees, teams, clubs</text:p>
      <text:p text:style-name="Text_20_body"><text:span text:style-name="T1">Community</text:span> - Large-scale CollectiveAgent - Examples: neighborhoods, societies, cultural communities</text:p>
      <text:p text:style-name="Text_20_body"><text:span text:style-name="T1">Person</text:span> - Dual-aspect modeling of human persons</text:p>
      <text:p text:style-name="Text_20_body"><text:span text:style-name="T1">NaturalPerson</text:span> - Physical/biological aspect: “that person walking down the street” - Extends Person and PhysicalAgent</text:p>
      <text:p text:style-name="Text_20_body"><text:span text:style-name="T1">SocialPerson</text:span> - Social/legal aspect: rights, roles, legal status - Extends Person</text:p>
      <text:p text:style-name="Text_20_body"><text:span text:style-name="T1">Personification</text:span> - Non-human entities treated as agents (social attribution) - Examples: AI assistants, corporate “personalities”, deities</text:p>
      <text:h text:style-name="Heading_20_5" text:outline-level="5"><text:bookmark-start text:name="physicalobject-subtree"/><text:soft-page-break/>PhysicalObject Subtree<text:bookmark-end text:name="physicalobject-subtree"/></text:h>
      <text:p text:style-name="First_20_paragraph"><text:span text:style-name="T1">PhysicalObject</text:span> - Proper spatial region - Typically has mass (varies by epistemological status) - Disjoint from SocialObject</text:p>
      <text:p text:style-name="Text_20_body"><text:span text:style-name="T1">PhysicalBody</text:span> - Natural material objects - Examples: rocks, biological bodies, chemical samples</text:p>
      <text:p text:style-name="Text_20_body"><text:span text:style-name="T1">BiologicalObject</text:span> - Objects with biological characteristics - Includes organisms and biological structures</text:p>
      <text:p text:style-name="Text_20_body"><text:span text:style-name="T1">ChemicalObject</text:span> - Objects characterized by chemical composition - Examples: molecules, chemical compounds</text:p>
      <text:p text:style-name="Text_20_body"><text:span text:style-name="T1">Substance</text:span> - Materials: water, steel, wood, DNA - Can be parts of other objects</text:p>
      <text:p text:style-name="Text_20_body"><text:span text:style-name="T1">FunctionalSubstance</text:span> - Substances with assigned functions - Examples: fuel, medicine, building material</text:p>
      <text:p text:style-name="Text_20_body"><text:span text:style-name="T1">PhysicalArtifact</text:span> - Human-made physical objects - Includes designed and repurposed objects</text:p>
      <text:p text:style-name="Text_20_body"><text:span text:style-name="T1">DesignedArtifact</text:span> - Artifacts described by a Design - Most common-sense “artifacts”: cars, tools, buildings</text:p>
      <text:p text:style-name="Text_20_body"><text:span text:style-name="T1">DesignedSubstance</text:span> - Substances that are also designed artifacts - Examples: pharmaceutical compounds, synthetic materials</text:p>
      <text:p text:style-name="Text_20_body"><text:span text:style-name="T1">PhysicalPlace</text:span> - Locations as physical objects - Have spatial extent</text:p>
      <text:h text:style-name="Heading_20_5" text:outline-level="5"><text:bookmark-start text:name="socialobject-subtree"/>SocialObject Subtree<text:bookmark-end text:name="socialobject-subtree"/></text:h>
      <text:p text:style-name="First_20_paragraph"><text:span text:style-name="T1">SocialObject</text:span> - Exist only through communication - Must be expressed by InformationObject - Disjoint from PhysicalObject</text:p>
      <text:p text:style-name="Text_20_body"><text:span text:style-name="T1">Description</text:span> - Conceptualizations: theories, schemas, frames - Define Concepts, Roles, Tasks - Satisfied by Situations</text:p>
      <text:p text:style-name="Text_20_body"><text:span text:style-name="T1">Plan</text:span> - Description of actions to be executed - Defines roles, tasks, sequencing - Examples: recipes, project plans, procedures</text:p>
      <text:p text:style-name="Text_20_body"><text:span text:style-name="T1">Project</text:span> - Plan with specific goals and timeline - Typically hierarchical (sub-projects)</text:p>
      <text:p text:style-name="Text_20_body"><text:span text:style-name="T1">Workflow</text:span> - Plan with explicit task sequencing - Examples: business processes, protocols</text:p>
      <text:p text:style-name="Text_20_body"><text:span text:style-name="T1">Design</text:span> - Description of structure and function - Includes rationale for construction - Examples: engineering designs, architectural plans</text:p>
      <text:p text:style-name="Text_20_body"><text:span text:style-name="T1">Diagnosis</text:span> - Description of system state - For control or explanation of behavior - Examples: medical diagnosis, fault analysis</text:p>
      <text:p text:style-name="Text_20_body"><text:span text:style-name="T1">Norm</text:span> - Social rules and obligations - Examples: laws, ethical codes, policies</text:p>
      <text:p text:style-name="Text_20_body"><text:span text:style-name="T1">Contract</text:span> - Agreement between parties (playing Party roles) - About contract object (typically a Task) - Examples: employment contracts, treaties</text:p>
      <text:p text:style-name="Text_20_body"><text:soft-page-break/><text:span text:style-name="T1">Goal</text:span> - Description of desired Situation - Associated with Plan for achievement - Examples: objectives, aspirations</text:p>
      <text:p text:style-name="Text_20_body"><text:span text:style-name="T1">Method</text:span> - Description guiding actions toward solutions - More general than Plan (alternative plans can follow same method) - Examples: scientific method, problem-solving strategies</text:p>
      <text:p text:style-name="Text_20_body"><text:span text:style-name="T1">Narrative</text:span> - Description of event sequences - Interpretive framing of events - Examples: histories, stories, case studies</text:p>
      <text:p text:style-name="Text_20_body"><text:span text:style-name="T1">Theory</text:span> - General conceptual framework - Examples: scientific theories, philosophical systems</text:p>
      <text:p text:style-name="Text_20_body"><text:span text:style-name="T1">Relation</text:span> - Description of relation patterns - Abstract relation schemas</text:p>
      <text:p text:style-name="Text_20_body"><text:span text:style-name="T1">Pattern</text:span> - Detected or proposed invariances - Examples: statistical patterns, design patterns</text:p>
      <text:p text:style-name="Text_20_body"><text:span text:style-name="T1">SocialRelation</text:span> - Social relation schemas - Examples: kinship relations, institutional relations</text:p>
      <text:p text:style-name="Text_20_body"><text:span text:style-name="T1">Right</text:span> - Entitlements and permissions - Legal or moral rights</text:p>
      <text:p text:style-name="Text_20_body"><text:span text:style-name="T1">Concept</text:span> - Categories defined in Descriptions - Classify entities in contexts</text:p>
      <text:p text:style-name="Text_20_body"><text:span text:style-name="T1">Role</text:span> - Concept for classifying agents in contexts - Examples: “student”, “driver”, “parent”</text:p>
      <text:p text:style-name="Text_20_body"><text:span text:style-name="T1">Task</text:span> - EventType describing how events should be interpreted/executed - Examples: “boiling”, “reviewing”, “driving”</text:p>
      <text:p text:style-name="Text_20_body"><text:span text:style-name="T1">EventType</text:span> - Concept for classifying events - Defined in Descriptions, classifies Events</text:p>
      <text:p text:style-name="Text_20_body"><text:span text:style-name="T1">LocalConcept</text:span> - Concept defined in exactly one Description - Specific to single conceptual frame</text:p>
      <text:p text:style-name="Text_20_body"><text:span text:style-name="T1">Parameter</text:span> - Concept for classifying Regions - Constraints or selections on values - Examples: “VeryHigh”, “Meter” (unit of measure)</text:p>
      <text:p text:style-name="Text_20_body"><text:span text:style-name="T1">UnitOfMeasure</text:span> - Parameter for measurement units - Examples: meter, kilogram, second, dollar</text:p>
      <text:p text:style-name="Text_20_body"><text:span text:style-name="T1">Collection</text:span> - Container for entities sharing properties - First-order entity (not a logical class) - Not an aggregate (see ObjectAggregate) - Examples: “all vintage saxophones”, “the nurses”</text:p>
      <text:p text:style-name="Text_20_body"><text:span text:style-name="T1">Collective</text:span> - Collection whose members are agents - Can act “as if” agents (facon de parler) - Examples: “the nurses”, “the fans”</text:p>
      <text:p text:style-name="Text_20_body"><text:span text:style-name="T1">Configuration</text:span> - Collection whose members are unified by a Description - Emerges from composed entities - Examples: parts of a book (unified by physical structure)</text:p>
      <text:p text:style-name="Text_20_body"><text:span text:style-name="T1">TypeCollection</text:span> - Collection of entities of a same type - Examples: all instances of a class</text:p>
      <text:p text:style-name="Text_20_body"><text:span text:style-name="T1">Place</text:span> - Socially constructed locations - Examples: countries, neighborhoods, institutions</text:p>
      <text:h text:style-name="Heading_20_4" text:outline-level="4"><text:bookmark-start text:name="quality-branch"/>Quality Branch<text:bookmark-end text:name="quality-branch"/></text:h>
      <text:p text:style-name="First_20_paragraph"><text:span text:style-name="T1">Quality</text:span> - Individual aspects of entities - Dependent on bearer entity - Has Region (value in dimensional space) - Examples: specific yellowness, specific height</text:p>
      <text:h text:style-name="Heading_20_4" text:outline-level="4"><text:bookmark-start text:name="situation-branch"/><text:soft-page-break/>Situation Branch<text:bookmark-end text:name="situation-branch"/></text:h>
      <text:p text:style-name="First_20_paragraph"><text:span text:style-name="T1">Situation</text:span> - Contextualized views satisfying Descriptions - Reified n-ary relations - Include multiple entities via <text:span text:style-name="Source_5f_Text">isSettingFor</text:span></text:p>
      <text:p text:style-name="Text_20_body"><text:span text:style-name="T1">Classification</text:span> - Time-indexed concept-entity classification - Special Situation for “X classifies Y at time T”</text:p>
      <text:p text:style-name="Text_20_body"><text:span text:style-name="T1">Parthood</text:span> - Time-indexed part-whole relations - Special Situation for “X is part of Y at time T”</text:p>
      <text:p text:style-name="Text_20_body"><text:span text:style-name="T1">PlanExecution</text:span> - Situation of executing a Plan - Links Actions to Tasks, Agents to Roles</text:p>
      <text:p text:style-name="Text_20_body"><text:span text:style-name="T1">WorkflowExecution</text:span> - Situation of executing a Workflow - Temporal sequencing of tasks</text:p>
      <text:p text:style-name="Text_20_body"><text:span text:style-name="T1">Transition</text:span> - Situation of change between states - Before/after state pairs</text:p>
      <text:p text:style-name="Text_20_body"><text:span text:style-name="T1">TimeIndexedRelation</text:span> - Superclass for time-indexed Situations - Includes Classification, Parthood</text:p>
      <text:h text:style-name="Heading_20_3" text:outline-level="3"><text:bookmark-start text:name="objectaggregate-1"/>6.3 ObjectAggregate<text:bookmark-end text:name="objectaggregate-1"/></text:h>
      <text:p text:style-name="First_20_paragraph"><text:span text:style-name="T1">ObjectAggregate</text:span> - Not a subclass of Entity (parallel hierarchy) - Aggregates of distributed objects from Collections - Physical distribution of collection members - Cannot be defined by equivalence axiom in OWL - Examples: stars in a constellation, car parts, encyclopedia entries</text:p>
      <text:p text:style-name="Horizontal_20_Line"/>
      <text:h text:style-name="Heading_20_2" text:outline-level="2"><text:bookmark-start text:name="vii.-property-reference"/>VII. Property Reference<text:bookmark-end text:name="vii.-property-reference"/></text:h>
      <text:h text:style-name="Heading_20_3" text:outline-level="3"><text:bookmark-start text:name="property-categories"/>7.1 Property Categories<text:bookmark-end text:name="property-categories"/></text:h>
      <text:p text:style-name="First_20_paragraph">DUL defines 112 object properties and 5 datatype properties. They can be organized by conceptual role:</text:p>
      <text:list text:style-name="L15">
        <text:list-item>
          <text:p text:style-name="P16">Participation &amp; Co-occurrence</text:p>
        </text:list-item>
        <text:list-item>
          <text:p text:style-name="P16">Mereological (Part-Whole)</text:p>
        </text:list-item>
        <text:list-item>
          <text:p text:style-name="P16">Quality &amp; Region</text:p>
        </text:list-item>
        <text:list-item>
          <text:p text:style-name="P16">Description &amp; Concept</text:p>
        </text:list-item>
        <text:list-item>
          <text:p text:style-name="P16">Information &amp; Expression</text:p>
        </text:list-item>
        <text:list-item>
          <text:p text:style-name="P16">Situation &amp; Context</text:p>
        </text:list-item>
        <text:list-item>
          <text:p text:style-name="P16">Classification &amp; Role</text:p>
        </text:list-item>
        <text:list-item>
          <text:p text:style-name="P16">Spatial &amp; Temporal</text:p>
        </text:list-item>
        <text:list-item>
          <text:p text:style-name="P16">Precedence &amp; Sequence</text:p>
        </text:list-item>
        <text:list-item>
          <text:p text:style-name="P16">Generic Relations</text:p>
        </text:list-item>
      </text:list>
      <text:h text:style-name="Heading_20_3" text:outline-level="3"><text:bookmark-start text:name="participation-properties"/>7.2 Participation Properties<text:bookmark-end text:name="participation-properties"/></text:h>
      <text:p text:style-name="First_20_paragraph"><text:span text:style-name="T1">hasParticipant / isParticipantIn</text:span> - Domain: Event → Range: Object - Links events to participating objects - Symmetric across domain/range via inverse - Example: “The <text:soft-page-break/>discussion has participant John”</text:p>
      <text:p text:style-name="Text_20_body"><text:span text:style-name="T1">coparticipatesWith</text:span> - Domain: Object → Range: Object - Symmetric relation between objects in same Event - Typically inferred from shared participation - Example: “Vitas and Jimmy coparticipate (in tennis match)”</text:p>
      <text:h text:style-name="Heading_20_3" text:outline-level="3"><text:bookmark-start text:name="mereological-properties"/>7.3 Mereological Properties<text:bookmark-end text:name="mereological-properties"/></text:h>
      <text:p text:style-name="First_20_paragraph"><text:span text:style-name="T1">hasPart / isPartOf</text:span> - Domain: Entity → Range: Entity - Reflexive + transitive general parthood - Example: “The body has part the brain”</text:p>
      <text:p text:style-name="Text_20_body"><text:span text:style-name="T1">hasProperPart / isProperPartOf</text:span> - Domain: Entity → Range: Entity - Asymmetric (irreflexive) + transitive strict parthood - Example: “2024 has proper part January”</text:p>
      <text:p text:style-name="Text_20_body"><text:span text:style-name="T1">hasComponent / isComponentOf</text:span> - Domain: Entity → Range: Entity - Asymmetric, non-transitive structural parthood - Assumes Design structuring the system - Example: “The car has component the engine”</text:p>
      <text:p text:style-name="Text_20_body"><text:span text:style-name="T1">hasConstituent / isConstituentOf</text:span> - Domain: Entity → Range: Entity - Cross-layer parthood (different ontological strata) - Example: “The person has constituent molecules”</text:p>
      <text:p text:style-name="Text_20_body"><text:span text:style-name="T1">includesWhole / includesPart</text:span> - Domain: Parthood (Situation) - For time-indexed parthood in Situations - Example: “Parthood Situation includes whole (bike) and part (rack)”</text:p>
      <text:h text:style-name="Heading_20_3" text:outline-level="3"><text:bookmark-start text:name="quality-region-properties"/>7.4 Quality &amp; Region Properties<text:bookmark-end text:name="quality-region-properties"/></text:h>
      <text:p text:style-name="First_20_paragraph"><text:span text:style-name="T1">hasQuality / isQualityOf</text:span> - Domain: Entity → Range: Quality - Links entities to their individual qualities - Example: “Dmitri has quality (his skin color)”</text:p>
      <text:p text:style-name="Text_20_body"><text:span text:style-name="T1">hasRegion / isRegionFor</text:span> - Domain: Entity → Range: Region - Links entities (esp. Qualities) to values - Example: “The yellowness has region Yellow₁”</text:p>
      <text:p text:style-name="Text_20_body"><text:span text:style-name="T1">hasConstraint / isConstraintFor</text:span> - Domain: Entity → Range: Parameter - Generic constraints encoded as Parameters - Example: “MinimumAge is constraint for Driver role”</text:p>
      <text:p text:style-name="Text_20_body"><text:span text:style-name="T1">hasParameter / isParameterFor</text:span> - Domain: Concept → Range: Parameter - Concepts have Parameters constraining classified entities - Example: “4WheelDriver Role has parameter MinimumAge”</text:p>
      <text:h text:style-name="Heading_20_3" text:outline-level="3"><text:bookmark-start text:name="description-concept-properties"/>7.5 Description &amp; Concept Properties<text:bookmark-end text:name="description-concept-properties"/></text:h>
      <text:p text:style-name="First_20_paragraph"><text:span text:style-name="T1">defines / isDefinedIn</text:span> - Domain: Description → Range: Concept - Descriptions define Concepts - Example: “Traffic Law defines Vehicle concept”</text:p>
      <text:p text:style-name="Text_20_body"><text:span text:style-name="T1">definesRole / isRoleDefinedIn</text:span> - Domain: Description → Range: Role - Specialization for Role definition - Example: “Recipe defines Ingredient role”</text:p>
      <text:p text:style-name="Text_20_body"><text:span text:style-name="T1">definesTask / isTaskDefinedIn</text:span> - Domain: Description → Range: Task - Specialization for Task definition - Example: “Recipe defines Boiling task”</text:p>
      <text:p text:style-name="Text_20_body"><text:span text:style-name="T1">describes / isDescribedBy</text:span> - Domain: Description → Range: Entity - Description gives unity to entity parts/constituents - Example: “Design describes the car”</text:p>
      <text:p text:style-name="Text_20_body"><text:soft-page-break/><text:span text:style-name="T1">expands / isExpandedIn</text:span> - Domain: Description → Range: Description - Partial order: one description expands another - By adding parts or refining concepts - Example: “Extended protocol expands basic protocol”</text:p>
      <text:h text:style-name="Heading_20_3" text:outline-level="3"><text:bookmark-start text:name="information-expression-properties"/>7.6 Information &amp; Expression Properties<text:bookmark-end text:name="information-expression-properties"/></text:h>
      <text:p text:style-name="First_20_paragraph"><text:span text:style-name="T1">expresses / isExpressedBy</text:span> - Domain: InformationObject → Range: SocialObject - InformationObjects express meanings (SocialObjects) - Example: “The term ‘Beehive’ expresses the Concept Beehive”</text:p>
      <text:p text:style-name="Text_20_body"><text:span text:style-name="T1">expressesConcept / isConceptExpressedBy</text:span> - Domain: InformationObject → Range: Concept - Specialization for Concept expression - Example: “The word ‘dog’ expresses Concept ‘dog’”</text:p>
      <text:p text:style-name="Text_20_body"><text:span text:style-name="T1">realizes / isRealizedBy</text:span> - Domain: InformationRealization → Range: InformationObject - Concrete realizations of abstract information - Example: “This book copy realizes the Constitution text”</text:p>
      <text:p text:style-name="Text_20_body"><text:span text:style-name="T1">concretelyExpresses</text:span> - Domain: InformationRealization → Range: Description - Direct link from realization to expressed Description - Should be inferred via realizes + expresses chain</text:p>
      <text:h text:style-name="Heading_20_3" text:outline-level="3"><text:bookmark-start text:name="situation-context-properties"/>7.7 Situation &amp; Context Properties<text:bookmark-end text:name="situation-context-properties"/></text:h>
      <text:p text:style-name="First_20_paragraph"><text:span text:style-name="T1">satisfies / isSatisfiedBy</text:span> - Domain: Situation → Range: Description - Situations satisfy (are consistent with) Descriptions - Example: “My cooking session satisfies the recipe”</text:p>
      <text:p text:style-name="Text_20_body"><text:span text:style-name="T1">isSettingFor / hasSetting</text:span> - Domain: Situation → Range: Entity - Situations are settings for included entities - Top-level property for n-ary relation projections</text:p>
      <text:p text:style-name="Text_20_body"><text:span text:style-name="T1">includesEvent / isEventIncludedIn</text:span> - Domain: Situation → Range: Event - Specialization for Events in Situations</text:p>
      <text:p text:style-name="Text_20_body"><text:span text:style-name="T1">includesAction / isActionIncludedIn</text:span> - Domain: Situation → Range: Action - Specialization for Actions in Situations</text:p>
      <text:p text:style-name="Text_20_body"><text:span text:style-name="T1">includesObject / isObjectIncludedIn</text:span> - Domain: Situation → Range: Object - Specialization for Objects in Situations</text:p>
      <text:p text:style-name="Text_20_body"><text:span text:style-name="T1">includesAgent / isAgentIncludedIn</text:span> - Domain: Situation → Range: Agent - Specialization for Agents in Situations</text:p>
      <text:p text:style-name="Text_20_body"><text:span text:style-name="T1">includesTime / isTimeIncludedIn</text:span> - Domain: Situation → Range: TimeInterval - Temporal extent of Situation - Example: “Cooking session includes time (this morning)”</text:p>
      <text:h text:style-name="Heading_20_3" text:outline-level="3"><text:bookmark-start text:name="classification-role-properties"/>7.8 Classification &amp; Role Properties<text:bookmark-end text:name="classification-role-properties"/></text:h>
      <text:p text:style-name="First_20_paragraph"><text:span text:style-name="T1">classifies / isClassifiedBy</text:span> - Domain: Concept → Range: Entity (at some time) - Concepts classify entities - Often time-indexed via Classification Situation - Example: “The concept ‘Student’ classifies John”</text:p>
      <text:p text:style-name="Text_20_body"><text:span text:style-name="T1">hasRole / isRoleOf</text:span> - Domain: Object → Range: Role - Objects have roles (in contexts) - <text:soft-page-break/>Example: “John has role Student”</text:p>
      <text:p text:style-name="Text_20_body"><text:span text:style-name="T1">hasTask / isTaskOf</text:span> - Domain: Role → Range: Task - Roles have associated tasks - Example: “Student role has task ‘giving exams’”</text:p>
      <text:p text:style-name="Text_20_body"><text:span text:style-name="T1">executesTask / isExecutedIn</text:span> - Domain: Action → Range: Task - Actions execute tasks - Example: “Mixing action executes Mixing task”</text:p>
      <text:p text:style-name="Text_20_body"><text:span text:style-name="T1">covers / isCoveredBy</text:span> - Domain: Concept → Range: Collection - Intensional-extensional link: Concept covers Collection - Example: “Saxophone concept covers collection of saxophones”</text:p>
      <text:h text:style-name="Heading_20_3" text:outline-level="3"><text:bookmark-start text:name="spatial-temporal-properties"/>7.9 Spatial &amp; Temporal Properties<text:bookmark-end text:name="spatial-temporal-properties"/></text:h>
      <text:p text:style-name="First_20_paragraph"><text:span text:style-name="T1">hasLocation / isLocationOf</text:span> - Domain: Entity → Range: Entity - Generic relative spatial location - Example: “The cat has location (on the mat)”</text:p>
      <text:p text:style-name="Text_20_body"><text:span text:style-name="T1">hasTimeInterval / isTimeIntervalOf</text:span> - Domain: Event → Range: TimeInterval - Temporal extent of events - Example: “The experiment has time interval August 9, 2004”</text:p>
      <text:p text:style-name="Text_20_body"><text:span text:style-name="T1">hasRegion / isRegionFor</text:span> (spatial usage) - Can link Objects to SpaceRegions for absolute location - Example: “The whale has region (34°E, 20°S)”</text:p>
      <text:p text:style-name="Text_20_body"><text:span text:style-name="T1">nearTo / farFrom</text:span> - Domain: Entity → Range: Entity - Symmetric distance relations - Example: “Rome is far from Beijing”</text:p>
      <text:p text:style-name="Text_20_body"><text:span text:style-name="T1">hasCommonBoundary</text:span> - Domain: Entity → Range: Entity - Symmetric relation for shared boundaries - Topological, temporal, or commonsense boundaries - Example: “France has common boundary with Spain”</text:p>
      <text:h text:style-name="Heading_20_3" text:outline-level="3"><text:bookmark-start text:name="precedence-sequence-properties"/>7.10 Precedence &amp; Sequence Properties<text:bookmark-end text:name="precedence-sequence-properties"/></text:h>
      <text:p text:style-name="First_20_paragraph"><text:span text:style-name="T1">precedes / follows</text:span> - Domain: Entity → Range: Entity - Transitive sequence relation - Temporal or logical ordering - Example: “Year 2000 follows 1999”</text:p>
      <text:p text:style-name="Text_20_body"><text:span text:style-name="T1">directlyPrecedes / directlyFollows</text:span> - Domain: Entity → Range: Entity - Intransitive (adjacent) precedence - Example: “Monday directly precedes Tuesday”</text:p>
      <text:p text:style-name="Text_20_body"><text:span text:style-name="T1">hasPrecondition / isPreconditionOf</text:span> - Domain: Situation → Range: Situation - Direct precedence for Situations - Example: “Precondition of war is claiming weapons”</text:p>
      <text:p text:style-name="Text_20_body"><text:span text:style-name="T1">hasPostcondition / isPostconditionOf</text:span> - Domain: Situation → Range: Situation - Direct succession for Situations - Example: “Postcondition of the plan is things settled”</text:p>
      <text:h text:style-name="Heading_20_3" text:outline-level="3"><text:bookmark-start text:name="generic-relations"/>7.11 Generic Relations<text:bookmark-end text:name="generic-relations"/></text:h>
      <text:p text:style-name="First_20_paragraph"><text:span text:style-name="T1">associatedWith</text:span> - Domain: Entity → Range: Entity - Symmetric, transitive catch-all relation - Use when no more specific property applies - Example: “Italian traffic law is associated with the Italian legal system”</text:p>
      <text:p text:style-name="Text_20_body"><text:span text:style-name="T1">overlaps</text:span> - Domain: Entity → Range: Entity - Symmetric overlap (mereological or spatial/temporal) - Example: “The 1990s overlap with the Cold War end”</text:p>
      <text:p text:style-name="Text_20_body"><text:soft-page-break/><text:span text:style-name="T1">sameSettingAs</text:span> - Domain: Entity → Range: Entity - Entities in the same Situation context - Derived from shared <text:span text:style-name="Source_5f_Text">hasSetting</text:span> values</text:p>
      <text:p text:style-name="Text_20_body"><text:span text:style-name="T1">actsFor / isActedBy</text:span> - Domain: Agent → Range: SocialAgent (esp. Organizations) - Agents act on behalf of social agents - Example: “CEO acts for the company”</text:p>
      <text:p text:style-name="Text_20_body"><text:span text:style-name="T1">actsThrough</text:span> - Domain: Agent → Range: Agent - Agent acts through another agent - Example: “The board acts through the CEO”</text:p>
      <text:h text:style-name="Heading_20_3" text:outline-level="3"><text:bookmark-start text:name="collection-properties"/>7.12 Collection Properties<text:bookmark-end text:name="collection-properties"/></text:h>
      <text:p text:style-name="First_20_paragraph"><text:span text:style-name="T1">hasMember / isMemberOf</text:span> - Domain: Collection → Range: Entity - Collection membership - Example: “My saxophone collection has member (this vintage alto)”</text:p>
      <text:h text:style-name="Heading_20_3" text:outline-level="3"><text:bookmark-start text:name="datatype-properties"/>7.13 Datatype Properties<text:bookmark-end text:name="datatype-properties"/></text:h>
      <text:p text:style-name="First_20_paragraph">DUL includes 5 datatype properties (linking entities to literal values):</text:p>
      <text:p text:style-name="Text_20_body"><text:span text:style-name="T1">hasDataValue</text:span> - Generic datatype property - Links entities to literal values (strings, numbers, etc.)</text:p>
      <text:p text:style-name="Text_20_body"><text:span text:style-name="T1">hasIntervalDate</text:span> - Links TimeInterval to date literals - Typically xsd:date or xsd:dateTime</text:p>
      <text:p text:style-name="Text_20_body"><text:span text:style-name="T1">hasRegionDataValue</text:span> - Links Region to literal values - For direct encoding of region values</text:p>
      <text:p text:style-name="P17">Note: In practice, many DUL applications use datatype properties from other vocabularies (e.g., xsd, time ontology) rather than these generic ones.</text:p>
      <text:p text:style-name="Horizontal_20_Line"/>
      <text:h text:style-name="Heading_20_2" text:outline-level="2"><text:bookmark-start text:name="viii.-usage-guidelines"/>VIII. Usage Guidelines<text:bookmark-end text:name="viii.-usage-guidelines"/></text:h>
      <text:h text:style-name="Heading_20_3" text:outline-level="3"><text:bookmark-start text:name="when-to-use-dul"/>8.1 When to Use DUL<text:bookmark-end text:name="when-to-use-dul"/></text:h>
      <text:p text:style-name="P18">DUL is appropriate when:</text:p>
      <text:list xml:id="list2046387516" text:style-name="L16">
        <text:list-item>
          <text:p text:style-name="P19">Domain complexity requires foundational rigor</text:p>
          <text:list text:style-name="L17">
            <text:list-item>
              <text:p text:style-name="P20">Multiple interacting domains (e.g., smart cities: urban planning + social services + IoT)</text:p>
            </text:list-item>
            <text:list-item>
              <text:p text:style-name="P20">Need for formal consistency across domains</text:p>
            </text:list-item>
          </text:list>
        </text:list-item>
        <text:list-item>
          <text:p text:style-name="P19">Context-sensitivity is central</text:p>
          <text:list text:style-name="L18">
            <text:list-item>
              <text:p text:style-name="P21">Roles, classifications, or relations change over time</text:p>
            </text:list-item>
            <text:list-item>
              <text:p text:style-name="P21">Multi-perspective modeling (same entities, different interpretations)</text:p>
            </text:list-item>
          </text:list>
        </text:list-item>
        <text:list-item>
          <text:p text:style-name="P19">Epistemological modeling matters</text:p>
          <text:list text:style-name="L19">
            <text:list-item>
              <text:p text:style-name="P22">Distinguishing facts from interpretations</text:p>
            </text:list-item>
            <text:list-item>
              <text:p text:style-name="P22">Representing theories, conceptual frameworks, or competing views</text:p>
            </text:list-item>
          </text:list>
        </text:list-item>
        <text:list-item>
          <text:p text:style-name="P19">Social and information aspects are prominent</text:p>
          <text:list text:style-name="L20">
            <text:list-item>
              <text:p text:style-name="P23">Organizations, roles, norms, contracts</text:p>
            </text:list-item>
            <text:list-item>
              <text:p text:style-name="P23">Documents, expressions, realizations</text:p>
            </text:list-item>
          </text:list>
        </text:list-item>
        <text:list-item>
          <text:p text:style-name="P19">Reusable patterns are valued</text:p>
          <text:list text:style-name="L21">
            <text:list-item>
              <text:p text:style-name="P24">Building on established ontology design patterns</text:p>
            </text:list-item>
            <text:list-item>
              <text:p text:style-name="P24"><text:soft-page-break/>Ensuring interoperability with other DUL-based ontologies</text:p>
            </text:list-item>
          </text:list>
        </text:list-item>
      </text:list>
      <text:p text:style-name="First_20_paragraph"><text:span text:style-name="T1">DUL may be overkill when:</text:span> - Simple taxonomies suffice (no need for reification) - Domain is purely physical/technical (no social constructs) - Time-indexing and context not needed - Lightweight vocabulary preferred (consider schema.org, Dublin Core)</text:p>
      <text:h text:style-name="Heading_20_3" text:outline-level="3"><text:bookmark-start text:name="how-to-extend-dul"/>8.2 How to Extend DUL<text:bookmark-end text:name="how-to-extend-dul"/></text:h>
      <text:h text:style-name="Heading_20_4" text:outline-level="4"><text:bookmark-start text:name="strategy-1-specialize-classes"/>Strategy 1: Specialize Classes<text:bookmark-end text:name="strategy-1-specialize-classes"/></text:h>
      <text:p text:style-name="First_20_paragraph">Create domain-specific subclasses:</text:p>
      <text:p text:style-name="Preformatted_20_Text">:MedicalProcedure rdfs:subClassOf dul:Action .</text:p>
      <text:p text:style-name="Preformatted_20_Text">:Patient rdfs:subClassOf dul:Role .</text:p>
      <text:p text:style-name="Preformatted_20_Text">:Hospital rdfs:subClassOf dul:Organization .</text:p>
      <text:p text:style-name="Preformatted_20_Text">:MedicalProtocol rdfs:subClassOf dul:Plan .</text:p>
      <text:h text:style-name="Heading_20_4" text:outline-level="4"><text:bookmark-start text:name="strategy-2-specialize-properties"/>Strategy 2: Specialize Properties<text:bookmark-end text:name="strategy-2-specialize-properties"/></text:h>
      <text:p text:style-name="First_20_paragraph">Create domain-specific sub-properties:</text:p>
      <text:p text:style-name="Preformatted_20_Text">:treats rdfs:subPropertyOf dul:hasParticipant .</text:p>
      <text:p text:style-name="Preformatted_20_Text"><text:s text:c="2"/># Domain: MedicalProcedure, Range: Patient</text:p>
      <text:p text:style-name="Preformatted_20_Text"/>
      <text:p text:style-name="Preformatted_20_Text">:prescribes rdfs:subPropertyOf dul:describes .</text:p>
      <text:p text:style-name="Preformatted_20_Text"><text:s text:c="2"/># Domain: Prescription, Range: Medication</text:p>
      <text:h text:style-name="Heading_20_4" text:outline-level="4"><text:bookmark-start text:name="strategy-3-use-patterns-directly"/>Strategy 3: Use Patterns Directly<text:bookmark-end text:name="strategy-3-use-patterns-directly"/></text:h>
      <text:p text:style-name="First_20_paragraph">Instantiate DUL classes without subclassing:</text:p>
      <text:p text:style-name="Preformatted_20_Text">:Recipe_ChocolateCake a dul:Plan ;</text:p>
      <text:p text:style-name="Preformatted_20_Text"><text:s text:c="2"/>dul:defines :Role_Baker, :Task_Mixing, :Role_Ingredient .</text:p>
      <text:p text:style-name="Preformatted_20_Text"/>
      <text:p text:style-name="Preformatted_20_Text">:MyCookingSession a dul:PlanExecution ;</text:p>
      <text:p text:style-name="Preformatted_20_Text"><text:s text:c="2"/>dul:satisfies :Recipe_ChocolateCake ;</text:p>
      <text:p text:style-name="Preformatted_20_Text"><text:s text:c="2"/>dul:includesAgent :Me ;</text:p>
      <text:p text:style-name="Preformatted_20_Text"><text:s text:c="2"/>dul:includesAction :MixingAction_20240615 .</text:p>
      <text:h text:style-name="Heading_20_4" text:outline-level="4"><text:bookmark-start text:name="strategy-4-align-with-other-ontologies"/>Strategy 4: Align with Other Ontologies<text:bookmark-end text:name="strategy-4-align-with-other-ontologies"/></text:h>
      <text:p text:style-name="First_20_paragraph">Map domain ontologies to DUL:</text:p>
      <text:p text:style-name="Preformatted_20_Text">:MedicalProcedure owl:equivalentClass [</text:p>
      <text:p text:style-name="Preformatted_20_Text"><text:s text:c="2"/>owl:intersectionOf (dul:Action :DomainSpecificMedicalClass)</text:p>
      <text:p text:style-name="Preformatted_20_Text">] .</text:p>
      <text:p text:style-name="Preformatted_20_Text"/>
      <text:p text:style-name="Preformatted_20_Text">schema:Person rdfs:subClassOf dul:NaturalPerson .</text:p>
      <text:h text:style-name="Heading_20_3" text:outline-level="3"><text:bookmark-start text:name="common-modeling-pitfalls"/>8.3 Common Modeling Pitfalls<text:bookmark-end text:name="common-modeling-pitfalls"/></text:h>
      <text:h text:style-name="Heading_20_4" text:outline-level="4"><text:bookmark-start text:name="pitfall-1-over-reification"/>Pitfall 1: Over-Reification<text:bookmark-end text:name="pitfall-1-over-reification"/></text:h>
      <text:p text:style-name="First_20_paragraph"><text:span text:style-name="T1">Problem</text:span>: Using Quality-Region for every attribute</text:p>
      <text:p text:style-name="Text_20_body"><text:span text:style-name="T1">Bad</text:span>:</text:p>
      <text:p text:style-name="Preformatted_20_Text"><text:soft-page-break/>:Car_123 dul:hasQuality :Color_Car123 .</text:p>
      <text:p text:style-name="Preformatted_20_Text">:Color_Car123 dul:hasRegion :Red .</text:p>
      <text:p text:style-name="First_20_paragraph"><text:span text:style-name="T1">Good</text:span> (if individual qualities don’t matter):</text:p>
      <text:p text:style-name="Preformatted_20_Text">:Car_123 :hasColor :Red .</text:p>
      <text:p text:style-name="First_20_paragraph"><text:span text:style-name="T1">When to reify</text:span>: Individual quality instances matter (observation tracking, temporal change of same quality)</text:p>
      <text:h text:style-name="Heading_20_4" text:outline-level="4"><text:bookmark-start text:name="pitfall-2-confusing-collections-and-sets"/>Pitfall 2: Confusing Collections and Sets<text:bookmark-end text:name="pitfall-2-confusing-collections-and-sets"/></text:h>
      <text:p text:style-name="First_20_paragraph"><text:span text:style-name="T1">Collection</text:span>: First-order SocialObject (members share properties) <text:span text:style-name="T1">Set</text:span>: Second-order FormalEntity (mathematical set) <text:span text:style-name="T1">ObjectAggregate</text:span>: Distributed physical aggregate of collection members</text:p>
      <text:p text:style-name="Text_20_body">Don’t use Collection for mathematical sets or vice versa.</text:p>
      <text:h text:style-name="Heading_20_4" text:outline-level="4"><text:bookmark-start text:name="pitfall-3-missing-descriptions"/>Pitfall 3: Missing Descriptions<text:bookmark-end text:name="pitfall-3-missing-descriptions"/></text:h>
      <text:p text:style-name="First_20_paragraph"><text:span text:style-name="T1">Problem</text:span>: Using Roles/Tasks without defining Descriptions</text:p>
      <text:p text:style-name="Text_20_body"><text:span text:style-name="T1">Bad</text:span>:</text:p>
      <text:p text:style-name="Preformatted_20_Text">:John dul:hasRole :Professor .</text:p>
      <text:p text:style-name="Preformatted_20_Text"># What describes the professor role? What are its constraints?</text:p>
      <text:p text:style-name="First_20_paragraph"><text:span text:style-name="T1">Good</text:span>:</text:p>
      <text:p text:style-name="Preformatted_20_Text">:AcademicStructure a dul:Description ;</text:p>
      <text:p text:style-name="Preformatted_20_Text"><text:s text:c="2"/>dul:defines :Professor .</text:p>
      <text:p text:style-name="Preformatted_20_Text"/>
      <text:p text:style-name="Preformatted_20_Text">:Professor a dul:Role ;</text:p>
      <text:p text:style-name="Preformatted_20_Text"><text:s text:c="2"/>dul:isDefinedIn :AcademicStructure .</text:p>
      <text:p text:style-name="Preformatted_20_Text"/>
      <text:p text:style-name="Preformatted_20_Text">:John dul:hasRole :Professor .</text:p>
      <text:p text:style-name="First_20_paragraph">Descriptions provide the conceptual grounding for Concepts/Roles/Tasks.</text:p>
      <text:h text:style-name="Heading_20_4" text:outline-level="4"><text:bookmark-start text:name="pitfall-4-ignoring-time-indexing"/>Pitfall 4: Ignoring Time-Indexing<text:bookmark-end text:name="pitfall-4-ignoring-time-indexing"/></text:h>
      <text:p text:style-name="First_20_paragraph"><text:span text:style-name="T1">Problem</text:span>: Using direct classification when time matters</text:p>
      <text:p text:style-name="Text_20_body"><text:span text:style-name="T1">Bad</text:span>:</text:p>
      <text:p text:style-name="Preformatted_20_Text">:Concept_Student dul:classifies :John .</text:p>
      <text:p text:style-name="Preformatted_20_Text"># When? Is John still a student?</text:p>
      <text:p text:style-name="First_20_paragraph"><text:span text:style-name="T1">Good</text:span>:</text:p>
      <text:p text:style-name="Preformatted_20_Text">:Classification_John_Student a dul:Classification ;</text:p>
      <text:p text:style-name="Preformatted_20_Text"><text:s text:c="2"/>dul:satisfies :UniversityStructure ;</text:p>
      <text:p text:style-name="Preformatted_20_Text"><text:s text:c="2"/>dul:isSettingFor :Concept_Student, :John, :TimeInterval_2020_2024 .</text:p>
      <text:p text:style-name="First_20_paragraph">Use Classification Situations when temporal context is relevant.</text:p>
      <text:h text:style-name="Heading_20_4" text:outline-level="4"><text:bookmark-start text:name="pitfall-5-misusing-situations"/>Pitfall 5: Misusing Situations<text:bookmark-end text:name="pitfall-5-misusing-situations"/></text:h>
      <text:p text:style-name="First_20_paragraph"><text:span text:style-name="T1">Problem</text:span>: Creating Situations without clear Descriptions or need</text:p>
      <text:p text:style-name="Text_20_body"><text:soft-page-break/><text:span text:style-name="T1">Bad</text:span>:</text:p>
      <text:p text:style-name="Preformatted_20_Text">:Situation_1 a dul:Situation ;</text:p>
      <text:p text:style-name="Preformatted_20_Text"><text:s text:c="2"/>dul:isSettingFor :Object_A, :Object_B .</text:p>
      <text:p text:style-name="Preformatted_20_Text"># What description does this satisfy? What is the conceptual frame?</text:p>
      <text:p text:style-name="First_20_paragraph"><text:span text:style-name="T1">Good</text:span>:</text:p>
      <text:p text:style-name="Preformatted_20_Text">:Situation_1 a dul:PlanExecution ;</text:p>
      <text:p text:style-name="Preformatted_20_Text"><text:s text:c="2"/>dul:satisfies :Plan_XYZ ;</text:p>
      <text:p text:style-name="Preformatted_20_Text"><text:s text:c="2"/>dul:includesAction :Action_1 ;</text:p>
      <text:p text:style-name="Preformatted_20_Text"><text:s text:c="2"/>dul:includesAgent :Agent_1 .</text:p>
      <text:p text:style-name="First_20_paragraph">Always link Situations to Descriptions that provide interpretation.</text:p>
      <text:h text:style-name="Heading_20_3" text:outline-level="3"><text:bookmark-start text:name="pattern-selection-guide"/>8.4 Pattern Selection Guide<text:bookmark-end text:name="pattern-selection-guide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Modeling Need</text:p>
            </table:table-cell>
            <table:table-cell table:style-name="Table1.A1" office:value-type="string">
              <text:p text:style-name="Table_20_Heading">Pattern</text:p>
            </table:table-cell>
            <table:table-cell table:style-name="Table1.A1" office:value-type="string">
              <text:p text:style-name="Table_20_Heading">Key Classes</text:p>
            </table:table-cell>
            <table:table-cell table:style-name="Table1.A1" office:value-type="string">
              <text:p text:style-name="Table_20_Heading">Key Properties</text:p>
            </table:table-cell>
          </table:table-row>
        </table:table-header-rows>
        <table:table-row>
          <table:table-cell table:style-name="Table1.A1" office:value-type="string">
            <text:p text:style-name="Table_20_Contents">Role assignment</text:p>
          </table:table-cell>
          <table:table-cell table:style-name="Table1.A1" office:value-type="string">
            <text:p text:style-name="Table_20_Contents">D&amp;S + Classification</text:p>
          </table:table-cell>
          <table:table-cell table:style-name="Table1.A1" office:value-type="string">
            <text:p text:style-name="Table_20_Contents">Description, Role, Agent, Classification</text:p>
          </table:table-cell>
          <table:table-cell table:style-name="Table1.A1" office:value-type="string">
            <text:p text:style-name="Table_20_Contents">defines, classifies, hasRole</text:p>
          </table:table-cell>
        </table:table-row>
        <table:table-row>
          <table:table-cell table:style-name="Table1.A1" office:value-type="string">
            <text:p text:style-name="Table_20_Contents">Task execution</text:p>
          </table:table-cell>
          <table:table-cell table:style-name="Table1.A1" office:value-type="string">
            <text:p text:style-name="Table_20_Contents">D&amp;S + Participation</text:p>
          </table:table-cell>
          <table:table-cell table:style-name="Table1.A1" office:value-type="string">
            <text:p text:style-name="Table_20_Contents">Plan, Task, Action, Agent</text:p>
          </table:table-cell>
          <table:table-cell table:style-name="Table1.A1" office:value-type="string">
            <text:p text:style-name="Table_20_Contents">defines, executesTask, hasParticipant</text:p>
          </table:table-cell>
        </table:table-row>
        <table:table-row>
          <table:table-cell table:style-name="Table1.A1" office:value-type="string">
            <text:p text:style-name="Table_20_Contents">Time-varying attributes</text:p>
          </table:table-cell>
          <table:table-cell table:style-name="Table1.A1" office:value-type="string">
            <text:p text:style-name="Table_20_Contents">Quality-Region</text:p>
          </table:table-cell>
          <table:table-cell table:style-name="Table1.A1" office:value-type="string">
            <text:p text:style-name="Table_20_Contents">Quality, Region, TimeInterval</text:p>
          </table:table-cell>
          <table:table-cell table:style-name="Table1.A1" office:value-type="string">
            <text:p text:style-name="Table_20_Contents">hasQuality, hasRegion</text:p>
          </table:table-cell>
        </table:table-row>
        <table:table-row>
          <table:table-cell table:style-name="Table1.A1" office:value-type="string">
            <text:p text:style-name="Table_20_Contents">Document modeling</text:p>
          </table:table-cell>
          <table:table-cell table:style-name="Table1.A1" office:value-type="string">
            <text:p text:style-name="Table_20_Contents">Information Realization</text:p>
          </table:table-cell>
          <table:table-cell table:style-name="Table1.A1" office:value-type="string">
            <text:p text:style-name="Table_20_Contents">InformationObject, InformationRealization</text:p>
          </table:table-cell>
          <table:table-cell table:style-name="Table1.A1" office:value-type="string">
            <text:p text:style-name="Table_20_Contents">realizes, expresses</text:p>
          </table:table-cell>
        </table:table-row>
        <table:table-row>
          <table:table-cell table:style-name="Table1.A1" office:value-type="string">
            <text:p text:style-name="Table_20_Contents">Part-whole decomposition</text:p>
          </table:table-cell>
          <table:table-cell table:style-name="Table1.A1" office:value-type="string">
            <text:p text:style-name="Table_20_Contents">Mereological</text:p>
          </table:table-cell>
          <table:table-cell table:style-name="Table1.A1" office:value-type="string">
            <text:p text:style-name="Table_20_Contents">Entity</text:p>
          </table:table-cell>
          <table:table-cell table:style-name="Table1.A1" office:value-type="string">
            <text:p text:style-name="Table_20_Contents">hasPart, hasComponent, hasConstituent</text:p>
          </table:table-cell>
        </table:table-row>
        <table:table-row>
          <table:table-cell table:style-name="Table1.A1" office:value-type="string">
            <text:p text:style-name="Table_20_Contents">Event participation</text:p>
          </table:table-cell>
          <table:table-cell table:style-name="Table1.A1" office:value-type="string">
            <text:p text:style-name="Table_20_Contents">Participation</text:p>
          </table:table-cell>
          <table:table-cell table:style-name="Table1.A1" office:value-type="string">
            <text:p text:style-name="Table_20_Contents">Event, Object, Agent</text:p>
          </table:table-cell>
          <table:table-cell table:style-name="Table1.A1" office:value-type="string">
            <text:p text:style-name="Table_20_Contents">hasParticipant, coparticipatesWith</text:p>
          </table:table-cell>
        </table:table-row>
        <table:table-row>
          <table:table-cell table:style-name="Table1.A1" office:value-type="string">
            <text:p text:style-name="Table_20_Contents">Workflow modeling</text:p>
          </table:table-cell>
          <table:table-cell table:style-name="Table1.A1" office:value-type="string">
            <text:p text:style-name="Table_20_Contents">D&amp;S + Sequence</text:p>
          </table:table-cell>
          <table:table-cell table:style-name="Table1.A1" office:value-type="string">
            <text:p text:style-name="Table_20_Contents">Workflow, Task, Action, WorkflowExecution</text:p>
          </table:table-cell>
          <table:table-cell table:style-name="Table1.A1" office:value-type="string">
            <text:p text:style-name="Table_20_Contents">defines, precedes, executesTask</text:p>
          </table:table-cell>
        </table:table-row>
        <table:table-row>
          <table:table-cell table:style-name="Table1.A1" office:value-type="string">
            <text:p text:style-name="Table_20_Contents">Multi-perspective views</text:p>
          </table:table-cell>
          <table:table-cell table:style-name="Table1.A1" office:value-type="string">
            <text:p text:style-name="Table_20_Contents">D&amp;S</text:p>
          </table:table-cell>
          <table:table-cell table:style-name="Table1.A1" office:value-type="string">
            <text:p text:style-name="Table_20_Contents">Description, Situation, Entity</text:p>
          </table:table-cell>
          <table:table-cell table:style-name="Table1.A1" office:value-type="string">
            <text:p text:style-name="Table_20_Contents">satisfies, isSettingFor</text:p>
          </table:table-cell>
        </table:table-row>
        <table:table-row>
          <table:table-cell table:style-name="Table1.A1" office:value-type="string">
            <text:p text:style-name="Table_20_Contents">Location modeling</text:p>
          </table:table-cell>
          <table:table-cell table:style-name="Table1.A1" office:value-type="string">
            <text:p text:style-name="Table_20_Contents">Place</text:p>
          </table:table-cell>
          <table:table-cell table:style-name="Table1.A1" office:value-type="string">
            <text:p text:style-name="Table_20_Contents">PhysicalPlace, Place, SpaceRegion</text:p>
          </table:table-cell>
          <table:table-cell table:style-name="Table1.A1" office:value-type="string">
            <text:p text:style-name="Table_20_Contents">hasLocation, hasRegion</text:p>
          </table:table-cell>
        </table:table-row>
        <table:table-row>
          <table:table-cell table:style-name="Table1.A1" office:value-type="string">
            <text:p text:style-name="Table_20_Contents">Organizational structure</text:p>
          </table:table-cell>
          <table:table-cell table:style-name="Table1.A1" office:value-type="string">
            <text:p text:style-name="Table_20_Contents">SocialAgent + D&amp;S</text:p>
          </table:table-cell>
          <table:table-cell table:style-name="Table1.A1" office:value-type="string">
            <text:p text:style-name="Table_20_Contents">Organization, Role, Agent, Description</text:p>
          </table:table-cell>
          <table:table-cell table:style-name="Table1.A1" office:value-type="string">
            <text:p text:style-name="Table_20_Contents">actsFor, hasRole, defines</text:p>
          </table:table-cell>
        </table:table-row>
      </table:table>
      <text:h text:style-name="Heading_20_3" text:outline-level="3"><text:bookmark-start text:name="modeling-workflow"/>8.5 Modeling Workflow<text:bookmark-end text:name="modeling-workflow"/></text:h>
      <text:list xml:id="list2469440382" text:style-name="L22">
        <text:list-item>
          <text:p text:style-name="P25">Identify Core Entities</text:p>
          <text:list text:style-name="L23">
            <text:list-item>
              <text:p text:style-name="P26">What are the main objects, agents, events in your domain?</text:p>
            </text:list-item>
            <text:list-item>
              <text:p text:style-name="P26">Classify as PhysicalObject, SocialObject, Event, etc.</text:p>
            </text:list-item>
          </text:list>
        </text:list-item>
        <text:list-item>
          <text:p text:style-name="P25">Identify Conceptual Frames</text:p>
          <text:list text:style-name="L24">
            <text:list-item>
              <text:p text:style-name="P27">What theories, standards, or schemas organize your domain?</text:p>
            </text:list-item>
            <text:list-item>
              <text:p text:style-name="P27">Model as Descriptions (Plan, Norm, Design, Theory, etc.)</text:p>
            </text:list-item>
          </text:list>
        </text:list-item>
        <text:list-item>
          <text:p text:style-name="P25">Define Concepts</text:p>
          <text:list text:style-name="L25">
            <text:list-item>
              <text:p text:style-name="P28">What roles, tasks, categories are defined by those frames?</text:p>
            </text:list-item>
            <text:list-item>
              <text:p text:style-name="P28">Model as Concepts (Role, Task, EventType, Parameter)</text:p>
            </text:list-item>
            <text:list-item>
              <text:p text:style-name="P28">Link via <text:span text:style-name="Source_5f_Text">defines</text:span> to Descriptions</text:p>
            </text:list-item>
          </text:list>
        </text:list-item>
        <text:list-item>
          <text:p text:style-name="P25"><text:soft-page-break/>Model Contexts</text:p>
          <text:list text:style-name="L26">
            <text:list-item>
              <text:p text:style-name="P29">What situations or contexts instantiate those frames?</text:p>
            </text:list-item>
            <text:list-item>
              <text:p text:style-name="P29">Model as Situations (PlanExecution, Classification, etc.)</text:p>
            </text:list-item>
            <text:list-item>
              <text:p text:style-name="P29">Link via <text:span text:style-name="Source_5f_Text">satisfies</text:span> to Descriptions</text:p>
            </text:list-item>
            <text:list-item>
              <text:p text:style-name="P29">Include entities via <text:span text:style-name="Source_5f_Text">isSettingFor</text:span> and specializations</text:p>
            </text:list-item>
          </text:list>
        </text:list-item>
        <text:list-item>
          <text:p text:style-name="P25">Add Participation</text:p>
          <text:list text:style-name="L27">
            <text:list-item>
              <text:p text:style-name="P30">How do objects participate in events?</text:p>
            </text:list-item>
            <text:list-item>
              <text:p text:style-name="P30">Use <text:span text:style-name="Source_5f_Text">hasParticipant</text:span> and specializations</text:p>
            </text:list-item>
          </text:list>
        </text:list-item>
        <text:list-item>
          <text:p text:style-name="P25">Add Mereology</text:p>
          <text:list text:style-name="L28">
            <text:list-item>
              <text:p text:style-name="P31">What part-whole relations exist?</text:p>
            </text:list-item>
            <text:list-item>
              <text:p text:style-name="P31">Choose appropriate parthood property (hasPart, hasComponent, hasConstituent)</text:p>
            </text:list-item>
          </text:list>
        </text:list-item>
        <text:list-item>
          <text:p text:style-name="P25">Add Temporal/Spatial Info</text:p>
          <text:list text:style-name="L29">
            <text:list-item>
              <text:p text:style-name="P32">When/where do events occur?</text:p>
            </text:list-item>
            <text:list-item>
              <text:p text:style-name="P32">Use <text:span text:style-name="Source_5f_Text">hasTimeInterval</text:span>, <text:span text:style-name="Source_5f_Text">hasLocation</text:span>, <text:span text:style-name="Source_5f_Text">hasRegion</text:span> (for SpaceRegion)</text:p>
            </text:list-item>
          </text:list>
        </text:list-item>
        <text:list-item>
          <text:p text:style-name="P33"><text:span text:style-name="T1">Add Information Layer</text:span> (if applicable)</text:p>
          <text:list text:style-name="L30">
            <text:list-item>
              <text:p text:style-name="P34">What information objects express domain concepts?</text:p>
            </text:list-item>
            <text:list-item>
              <text:p text:style-name="P34">Model InformationObjects and their realizations</text:p>
            </text:list-item>
            <text:list-item>
              <text:p text:style-name="P34">Use <text:span text:style-name="Source_5f_Text">expresses</text:span>, <text:span text:style-name="Source_5f_Text">realizes</text:span></text:p>
            </text:list-item>
          </text:list>
        </text:list-item>
        <text:list-item>
          <text:p text:style-name="P33"><text:span text:style-name="T1">Refine with Parameters and Qualities</text:span> (if needed)</text:p>
          <text:list text:style-name="L31">
            <text:list-item>
              <text:p text:style-name="P35">Add Quality-Region pattern for fine-grained attributes</text:p>
            </text:list-item>
            <text:list-item>
              <text:p text:style-name="P35">Add Parameters to Concepts for constraints</text:p>
            </text:list-item>
          </text:list>
        </text:list-item>
        <text:list-item>
          <text:p text:style-name="P25">Validate Against Patterns</text:p>
          <text:list text:style-name="L32">
            <text:list-item>
              <text:p text:style-name="P36">Check that Descriptions define Concepts</text:p>
            </text:list-item>
            <text:list-item>
              <text:p text:style-name="P36">Check that Situations satisfy Descriptions</text:p>
            </text:list-item>
            <text:list-item>
              <text:p text:style-name="P36">Check that Classifications include Concepts, Entities, and Times</text:p>
            </text:list-item>
            <text:list-item>
              <text:p text:style-name="P36">Check that Properties have appropriate domains/ranges</text:p>
            </text:list-item>
          </text:list>
        </text:list-item>
      </text:list>
      <text:h text:style-name="Heading_20_3" text:outline-level="3"><text:bookmark-start text:name="tool-support"/>8.6 Tool Support<text:bookmark-end text:name="tool-support"/></text:h>
      <text:p text:style-name="First_20_paragraph"><text:span text:style-name="T1">Ontology Editors:</text:span> - <text:span text:style-name="T1">Protégé</text:span>: Most popular OWL editor, good DUL support - <text:span text:style-name="T1">TopBraid Composer</text:span>: Commercial, strong reasoning support - <text:span text:style-name="T1">WebProtégé</text:span>: Web-based collaborative editing</text:p>
      <text:p text:style-name="Text_20_body"><text:span text:style-name="T1">Reasoners:</text:span> - <text:span text:style-name="T1">HermiT</text:span>: OWL 2 reasoner, handles DUL axioms well - <text:span text:style-name="T1">Pellet</text:span>: OWL DL reasoner - <text:span text:style-name="T1">FaCT++</text:span>: Fast classification</text:p>
      <text:p text:style-name="Text_20_body"><text:span text:style-name="T1">Validation:</text:span> - Check for orphan Concepts (not defined in any Description) - Check for Situations without satisfying Descriptions - Check domain/range violations (OWL reasoner will detect)</text:p>
      <text:p text:style-name="Text_20_body"><text:span text:style-name="T1">Visualization:</text:span> - <text:span text:style-name="T1">OntoGraf</text:span> (Protégé plugin): Visual class hierarchy - <text:span text:style-name="T1">VOWL</text:span>: Visual notation for ontologies - <text:span text:style-name="T1">WebVOWL</text:span>: Web-based ontology visualization</text:p>
      <text:h text:style-name="Heading_20_3" text:outline-level="3"><text:bookmark-start text:name="best-practices-summary"/>8.7 Best Practices Summary<text:bookmark-end text:name="best-practices-summary"/></text:h>
      <text:list text:style-name="L33">
        <text:list-item>
          <text:p text:style-name="P37"><text:span text:style-name="T1">Start Simple</text:span>: Use DUL patterns incrementally, don’t try to model everything at once</text:p>
        </text:list-item>
        <text:list-item>
          <text:p text:style-name="P37"><text:span text:style-name="T1">Document Decisions</text:span>: Annotate why you chose specific DUL classes/properties</text:p>
        </text:list-item>
        <text:list-item>
          <text:p text:style-name="P37"><text:span text:style-name="T1">Reuse Patterns</text:span>: Don’t reinvent—DUL patterns are tested and widely understood</text:p>
        </text:list-item>
        <text:list-item>
          <text:p text:style-name="P37"><text:span text:style-name="T1">Prioritize Descriptions</text:span>: They are the conceptual foundation—model them carefully</text:p>
        </text:list-item>
        <text:list-item>
          <text:p text:style-name="P37"><text:soft-page-break/><text:span text:style-name="T1">Use Situations for Context</text:span>: Whenever time, perspective, or framing matters</text:p>
        </text:list-item>
        <text:list-item>
          <text:p text:style-name="P37"><text:span text:style-name="T1">Avoid Over-Engineering</text:span>: Not every attribute needs Quality-Region; use when beneficial</text:p>
        </text:list-item>
        <text:list-item>
          <text:p text:style-name="P37"><text:span text:style-name="T1">Validate Frequently</text:span>: Use reasoners to catch modeling errors early</text:p>
        </text:list-item>
        <text:list-item>
          <text:p text:style-name="P37"><text:span text:style-name="T1">Align with Community</text:span>: Check existing DUL-based ontologies in your domain</text:p>
        </text:list-item>
        <text:list-item>
          <text:p text:style-name="P37"><text:span text:style-name="T1">Maintain Consistency</text:span>: Follow naming conventions (e.g., capitalize classes, camelCase properties)</text:p>
        </text:list-item>
        <text:list-item>
          <text:p text:style-name="P37"><text:span text:style-name="T1">Plan for Evolution</text:span>: Ontologies change—design for extensibility</text:p>
        </text:list-item>
      </text:list>
      <text:p text:style-name="Horizontal_20_Line"/>
      <text:h text:style-name="Heading_20_2" text:outline-level="2"><text:bookmark-start text:name="conclusion"/>Conclusion<text:bookmark-end text:name="conclusion"/></text:h>
      <text:p text:style-name="First_20_paragraph">DUL (DOLCE+DnS Ultralite) provides a <text:span text:style-name="T1">comprehensive foundational framework</text:span> for ontology engineering, distinguished by:</text:p>
      <text:list text:style-name="L34">
        <text:list-item>
          <text:p text:style-name="P38"><text:span text:style-name="T1">Epistemological sophistication</text:span>: Acknowledging that modeling is always mediated by conceptual frames (Descriptions and Situations)</text:p>
        </text:list-item>
        <text:list-item>
          <text:p text:style-name="P38"><text:span text:style-name="T1">Social-cognitive orientation</text:span>: Rich modeling of social objects, information, agency, and intentionality</text:p>
        </text:list-item>
        <text:list-item>
          <text:p text:style-name="P38"><text:span text:style-name="T1">Pattern-based design</text:span>: Reusable content patterns for common modeling challenges</text:p>
        </text:list-item>
        <text:list-item>
          <text:p text:style-name="P38"><text:span text:style-name="T1">Practical simplification</text:span>: More accessible than full DOLCE while maintaining philosophical rigor</text:p>
        </text:list-item>
      </text:list>
      <text:p text:style-name="First_20_paragraph"><text:span text:style-name="T1">The DUL Mindset</text:span> involves: 1. <text:span text:style-name="T1">Frame-based thinking</text:span>: Reality is always interpreted through Descriptions 2. <text:span text:style-name="T1">Context awareness</text:span>: Relations and properties often depend on Situations 3. <text:span text:style-name="T1">Reification</text:span>: Making relations, attributes, and contexts first-class entities when needed 4. <text:span text:style-name="T1">Pluralism</text:span>: Multiple valid perspectives on the same reality 5. <text:span text:style-name="T1">Social construction</text:span>: Recognizing information and communication as constitutive of social reality</text:p>
      <text:p text:style-name="Text_20_body">By adopting these principles and applying DUL’s patterns, ontology engineers can create <text:span text:style-name="T1">interoperable, maintainable, and conceptually rigorous domain models</text:span> that capture not just “what exists” but “how we understand what exists”—which is, ultimately, what knowledge representation is about.</text:p>
      <text:p text:style-name="Horizontal_20_Line"/>
      <text:h text:style-name="Heading_20_2" text:outline-level="2"><text:bookmark-start text:name="references-and-further-reading"/>References and Further Reading<text:bookmark-end text:name="references-and-further-reading"/></text:h>
      <text:h text:style-name="Heading_20_3" text:outline-level="3"><text:bookmark-start text:name="primary-sources"/>Primary Sources<text:bookmark-end text:name="primary-sources"/></text:h>
      <text:list text:style-name="L35">
        <text:list-item>
          <text:p text:style-name="P39"><text:span text:style-name="T1">DUL Namespace</text:span>: http://www.ontologydesignpatterns.org/ont/dul/DUL.owl</text:p>
        </text:list-item>
        <text:list-item>
          <text:p text:style-name="P39"><text:span text:style-name="T1">Ontology Design Patterns Portal</text:span>: http://ontologydesignpatterns.org/</text:p>
        </text:list-item>
      </text:list>
      <text:h text:style-name="Heading_20_3" text:outline-level="3"><text:bookmark-start text:name="foundational-papers"/>Foundational Papers<text:bookmark-end text:name="foundational-papers"/></text:h>
      <text:list text:style-name="L36">
        <text:list-item>
          <text:p text:style-name="P40">Gangemi, A., &amp; Mika, P. (2003). “Understanding the Semantic Web through Descriptions and Situations”</text:p>
        </text:list-item>
        <text:list-item>
          <text:p text:style-name="P40">Masolo, C., et al. (2003). “DOLCE: a Descriptive Ontology for Linguistic and Cognitive Engineering” (WonderWeb D18)</text:p>
        </text:list-item>
        <text:list-item>
          <text:p text:style-name="P40">Borgo, S., &amp; Masolo, C. (2009). “Foundational Choices in DOLCE”</text:p>
        </text:list-item>
      </text:list>
      <text:h text:style-name="Heading_20_3" text:outline-level="3"><text:bookmark-start text:name="related-ontologies"/><text:soft-page-break/>Related Ontologies<text:bookmark-end text:name="related-ontologies"/></text:h>
      <text:list text:style-name="L37">
        <text:list-item>
          <text:p text:style-name="P41"><text:span text:style-name="T1">DOLCE Lite-Plus</text:span>: Parent ontology</text:p>
        </text:list-item>
        <text:list-item>
          <text:p text:style-name="P41"><text:span text:style-name="T1">DOLCE Full</text:span>: Complete formalization</text:p>
        </text:list-item>
        <text:list-item>
          <text:p text:style-name="P41"><text:span text:style-name="T1">IOLite</text:span>: Information Objects ontology</text:p>
        </text:list-item>
        <text:list-item>
          <text:p text:style-name="P41"><text:span text:style-name="T1">COS/KCO</text:span>: Computational objects ontologies</text:p>
        </text:list-item>
      </text:list>
      <text:h text:style-name="Heading_20_3" text:outline-level="3"><text:bookmark-start text:name="philosophical-background"/>Philosophical Background<text:bookmark-end text:name="philosophical-background"/></text:h>
      <text:list text:style-name="L38">
        <text:list-item>
          <text:p text:style-name="P42">Guarino, N. (1998). “Formal Ontology and Information Systems”</text:p>
        </text:list-item>
        <text:list-item>
          <text:p text:style-name="P42">Smith, B. (2003). “Ontology” (Blackwell Guide to the Philosophy of Computing and Information)</text:p>
        </text:list-item>
        <text:list-item>
          <text:p text:style-name="P42">Searle, J. (1995). “The Construction of Social Reality”</text:p>
        </text:list-item>
      </text:list>
      <text:h text:style-name="Heading_20_3" text:outline-level="3"><text:bookmark-start text:name="pattern-catalogs"/>Pattern Catalogs<text:bookmark-end text:name="pattern-catalogs"/></text:h>
      <text:list text:style-name="L39">
        <text:list-item>
          <text:p text:style-name="P43">Gangemi, A. (2005). “Ontology Design Patterns for Semantic Web Content”</text:p>
        </text:list-item>
        <text:list-item>
          <text:p text:style-name="P43">Blomqvist, E., et al. (2016). “Ontology Design Patterns: Current Trends and Future Directions”</text:p>
        </text:list-item>
      </text:list>
      <text:p text:style-name="Horizontal_20_Line"/>
      <text:p text:style-name="First_20_paragraph"><text:span text:style-name="T1">Document Version</text:span>: 1.0 <text:span text:style-name="T1">DUL Version Documented</text:span>: v3.34 <text:span text:style-name="T1">Last Updated</text:span>: 2024 <text:span text:style-name="T1">Author</text:span>: Generated from ontology analysis <text:span text:style-name="T1">License</text:span>: This documentation follows the same licensing as DUL ontology (check http://www.ontologydesignpatterns.org for detail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4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title/>
    <dc:description/>
    <dc:subject/>
    <meta:keyword/>
    <meta:initial-creator/>
    <meta:creation-date>2025-11-04T18:37:45Z</meta:creation-date>
    <dc:date>2025-11-04T15:39:34.302670355</dc:date>
    <meta:print-date>2025-11-04T15:38:45.262832043</meta:print-date>
    <meta:printed-by>PDF files</meta:printed-by>
    <meta:editing-duration>PT1M31S</meta:editing-duration>
    <meta:editing-cycles>1</meta:editing-cycles>
    <meta:document-statistic meta:table-count="1" meta:image-count="0" meta:object-count="0" meta:page-count="34" meta:paragraph-count="902" meta:word-count="8819" meta:character-count="64661" meta:non-whitespace-character-count="56462"/>
  </office:meta>
</office:document-meta>
</file>