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0T10:28:09.485828858</meta:creation-date>
    <meta:generator>LibreOffice/25.2.3.2$Linux_X86_64 LibreOffice_project/520$Build-2</meta:generator>
    <dc:date>2025-06-20T10:29:49.629468783</dc:date>
    <meta:editing-duration>PT1M4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